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4.png"/>
  <manifest:file-entry manifest:media-type="image/png" manifest:full-path="Pictures/image1.png"/>
  <manifest:file-entry manifest:media-type="image/png" manifest:full-path="Pictures/image2.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37" style:family="text">
      <style:text-properties fo:font-family="ARIAL" fo:font-size="14.000000000000000pt"/>
    </style:style>
    <style:style style:name="T38" style:family="text">
      <style:text-properties fo:font-family="ARIAL"/>
    </style:style>
    <style:style style:name="T39" style:family="text">
      <style:text-properties fo:font-family="ARIAL" fo:font-weight="bold"/>
    </style:style>
    <style:style style:name="T40" style:family="text">
      <style:text-properties fo:font-family="ARIAL" fo:font-weight="normal"/>
    </style:style>
    <style:style style:name="T41" style:family="text">
      <style:text-properties fo:font-size="12.000000000000000pt"/>
    </style:style>
    <style:style style:name="T42" style:family="text">
      <style:text-properties fo:font-family="DejaVu Sans"/>
    </style:style>
    <style:style style:name="T43" style:family="text">
      <style:text-properties fo:font-family="ARIAL" fo:font-style="italic"/>
    </style:style>
    <style:style style:name="T44" style:family="text">
      <style:text-properties fo:font-family="ARIAL" fo:font-style="normal"/>
    </style:style>
    <style:style style:name="T45" style:family="text">
      <style:text-properties fo:font-family="DejaVu Sans" fo:font-style="normal"/>
    </style:style>
    <style:style style:name="T46" style:family="text">
      <style:text-properties fo:font-family="ARIAL" fo:font-style="normal" fo:font-weight="bold"/>
    </style:style>
    <style:style style:name="T47" style:family="text">
      <style:text-properties fo:font-family="arial"/>
    </style:style>
    <style:style style:name="T48" style:family="text">
      <style:text-properties fo:font-family="DejaVu Sans" fo:font-style="italic"/>
    </style:style>
    <style:style style:name="T49" style:family="text">
      <style:text-properties fo:font-family="arial" fo:font-style="italic"/>
    </style:style>
    <style:style style:name="T50" style:family="text">
      <style:text-properties fo:font-family="arial" fo:font-weight="bold"/>
    </style:style>
    <style:style style:name="T51" style:family="text">
      <style:text-properties fo:country="US" fo:font-family="arial" fo:language="en"/>
    </style:style>
    <style:style style:name="T52" style:family="text">
      <style:text-properties fo:font-family="arial" fo:font-style="normal" fo:font-weight="normal"/>
    </style:style>
    <style:style style:name="P1" style:parent-style-name="Standard" style:family="paragraph" style:master-page-name="MasterPage2">
      <style:paragraph-properties fo:text-align="justify" style:tab-stop-distance="35.450000000000003pt"/>
      <style:text-properties fo:color="#000000" fo:country="MX" fo:font-family="Liberation Serif" fo:font-size="12.000000000000000pt" fo:language="es"/>
    </style:style>
    <style:style style:name="P2" style:parent-style-name="Standard" style:family="paragraph">
      <style:paragraph-properties fo:text-align="justify" style:tab-stop-distance="35.450000000000003pt"/>
      <style:text-properties fo:color="#000000" fo:country="MX" fo:font-family="Liberation Serif" fo:font-size="12.000000000000000pt" fo:font-weight="bold" fo:language="es"/>
    </style:style>
    <style:style style:name="P3" style:parent-style-name="Standard" style:family="paragraph">
      <style:paragraph-properties fo:text-align="justify" style:tab-stop-distance="35.450000000000003pt"/>
      <style:text-properties fo:color="#000000" fo:country="MX" fo:font-family="Liberation Serif" fo:font-size="12.000000000000000pt" fo:font-weight="normal" fo:language="es"/>
    </style:style>
    <style:style style:name="P4" style:family="paragraph">
      <style:text-properties fo:color="#000000" fo:font-family="Sans Serif"/>
    </style:style>
    <style:style style:name="P5" style:parent-style-name="Standard" style:family="paragraph" style:master-page-name="MasterPage3">
      <style:paragraph-properties fo:break-before="page" fo:text-align="justify" style:tab-stop-distance="35.450000000000003pt"/>
      <style:text-properties fo:color="#000000" fo:country="MX" fo:font-family="Liberation Serif" fo:font-size="12.000000000000000pt" fo:font-weight="normal" fo:language="es"/>
    </style:style>
    <style:style style:name="P6" style:parent-style-name="Standard" style:family="paragraph" style:master-page-name="MasterPage4">
      <style:paragraph-properties fo:break-before="page" fo:text-align="justify" style:tab-stop-distance="35.450000000000003pt"/>
      <style:text-properties fo:color="#000000" fo:country="MX" fo:font-family="Liberation Serif" fo:font-size="12.000000000000000pt" fo:font-weight="normal" fo:language="es"/>
    </style:style>
    <style:style style:name="P7" style:family="paragraph">
      <style:paragraph-properties fo:text-align="center"/>
      <style:text-properties fo:color="#000000" fo:font-family="Sans Serif"/>
    </style:style>
    <style:style style:name="P8" style:parent-style-name="Standard" style:family="paragraph" style:master-page-name="MasterPage5">
      <style:paragraph-properties fo:break-before="page" fo:text-align="justify" style:tab-stop-distance="35.450000000000003pt"/>
      <style:text-properties fo:color="#000000" fo:country="MX" fo:font-family="Liberation Serif" fo:font-size="12.000000000000000pt" fo:font-weight="normal" fo:language="es"/>
    </style:style>
    <style:style style:name="P9" style:parent-style-name="Table_20Contents" style:family="paragraph">
      <style:paragraph-properties fo:text-align="justify" style:tab-stop-distance="35.450000000000003pt"/>
      <style:text-properties fo:color="#000000" fo:country="MX" fo:font-family="Liberation Serif" fo:font-size="12.000000000000000pt" fo:language="es"/>
    </style:style>
    <style:style style:name="P10" style:parent-style-name="Standard" style:family="paragraph" style:master-page-name="MasterPage6">
      <style:paragraph-properties fo:break-before="page" fo:text-align="justify" style:tab-stop-distance="35.450000000000003pt"/>
      <style:text-properties fo:color="#000000" fo:country="MX" fo:font-family="Liberation Serif" fo:font-size="12.000000000000000pt" fo:font-weight="normal" fo:language="es"/>
    </style:style>
    <style:style style:name="P11" style:parent-style-name="Standard" style:family="paragraph">
      <style:paragraph-properties fo:text-align="justify" style:tab-stop-distance="35.450000000000003pt"/>
      <style:text-properties fo:color="#000000" fo:country="MX" fo:font-family="Liberation Serif" fo:font-size="12.000000000000000pt" fo:font-style="normal" fo:font-weight="normal" fo:language="es"/>
    </style:style>
    <style:style style:name="P12" style:parent-style-name="Standard" style:family="paragraph">
      <style:paragraph-properties fo:text-align="justify" style:tab-stop-distance="35.450000000000003pt"/>
      <style:text-properties fo:color="#000000" fo:country="MX" fo:font-family="Liberation Serif" fo:font-size="12.000000000000000pt" fo:font-style="normal" fo:font-weight="bold" fo:language="es"/>
    </style:style>
    <style:style style:name="P13" style:parent-style-name="Standard" style:family="paragraph">
      <style:paragraph-properties fo:text-align="justify" style:tab-stop-distance="35.450000000000003pt"/>
      <style:text-properties fo:color="#000000" fo:country="MX" fo:font-family="Liberation Serif" fo:font-size="12.000000000000000pt" fo:font-style="italic" fo:font-weight="normal" fo:language="es"/>
    </style:style>
    <style:style style:name="P14" style:family="paragraph"/>
    <style:style style:name="P15" style:parent-style-name="Table_20Contents" style:family="paragraph">
      <style:paragraph-properties fo:margin-left="0.000000000000000pt" fo:margin-right="0.000000000000000pt" fo:text-align="justify" fo:text-indent="0.000000000000000pt" style:tab-stop-distance="35.450000000000003pt"/>
      <style:text-properties fo:color="#000000" fo:country="MX" fo:font-family="Liberation Serif" fo:font-size="12.000000000000000pt" fo:language="es"/>
    </style:style>
    <style:style style:name="P16" style:parent-style-name="Standard" style:family="paragraph">
      <style:paragraph-properties fo:text-align="center" style:tab-stop-distance="35.450000000000003pt"/>
      <style:text-properties fo:color="#000000" fo:country="MX" fo:font-family="Liberation Serif" fo:font-size="12.000000000000000pt" fo:font-style="normal" fo:font-weight="normal" fo:language="es"/>
    </style:style>
    <style:style style:name="P17" style:parent-style-name="Standard" style:family="paragraph" style:list-style-name="WWNum1">
      <style:paragraph-properties fo:text-align="justify" style:tab-stop-distance="35.450000000000003pt"/>
      <style:text-properties fo:color="#000000" fo:country="MX" fo:font-family="Liberation Serif" fo:font-size="12.000000000000000pt" fo:font-style="normal" fo:font-weight="normal" fo:language="es"/>
    </style:style>
    <style:style style:name="P18" style:parent-style-name="Standard" style:family="paragraph" style:list-style-name="WWNum21">
      <style:paragraph-properties fo:text-align="justify" style:tab-stop-distance="35.450000000000003pt"/>
      <style:text-properties fo:color="#000000" fo:country="MX" fo:font-family="Liberation Serif" fo:font-size="12.000000000000000pt" fo:font-style="normal" fo:font-weight="normal" fo:language="es"/>
    </style:style>
    <style:style style:name="P19" style:parent-style-name="Standard" style:family="paragraph" style:list-style-name="WWNum3">
      <style:paragraph-properties fo:text-align="justify" style:tab-stop-distance="35.450000000000003pt"/>
      <style:text-properties fo:color="#000000" fo:country="MX" fo:font-family="Liberation Serif" fo:font-size="12.000000000000000pt" fo:font-style="normal" fo:font-weight="normal" fo:language="es"/>
    </style:style>
    <style:style style:name="P20" style:parent-style-name="Standard" style:family="paragraph" style:master-page-name="MasterPage7">
      <style:paragraph-properties fo:break-before="page" fo:text-align="justify" style:tab-stop-distance="35.450000000000003pt"/>
      <style:text-properties fo:color="#000000" fo:country="MX" fo:font-family="Liberation Serif" fo:font-size="12.000000000000000pt" fo:font-style="normal" fo:font-weight="normal" fo:language="es"/>
    </style:style>
    <style:style style:name="P21" style:parent-style-name="Standard" style:family="paragraph" style:master-page-name="MasterPage8">
      <style:paragraph-properties fo:break-before="page" fo:text-align="justify" style:tab-stop-distance="35.450000000000003pt"/>
      <style:text-properties fo:color="#000000" fo:country="MX" fo:font-family="Liberation Serif" fo:font-size="12.000000000000000pt" fo:font-style="normal" fo:font-weight="normal" fo:language="es"/>
    </style:style>
    <style:style style:name="P22" style:parent-style-name="Standard" style:family="paragraph">
      <style:paragraph-properties fo:break-before="page" fo:text-align="justify" style:tab-stop-distance="35.450000000000003pt"/>
      <style:text-properties fo:color="#000000" fo:country="MX" fo:font-family="Liberation Serif" fo:font-size="12.000000000000000pt" fo:font-style="normal" fo:font-weight="normal" fo:language="es"/>
    </style:style>
    <style:style style:name="P23" style:parent-style-name="Standard" style:family="paragraph">
      <style:paragraph-properties fo:text-align="justify" style:tab-stop-distance="35.450000000000003pt"/>
      <style:text-properties fo:color="#000000" fo:country="MX" fo:font-family="Liberation Serif" fo:font-size="12.000000000000000pt" fo:language="es"/>
    </style:style>
    <style:style style:name="Table1" style:family="table">
      <style:table-properties fo:margin-left="0.000000000000000pt" style:width="509.670174283999984pt" table:align="left" table:border-model="collapsing"/>
    </style:style>
    <style:style style:name="Table2" style:family="table">
      <style:table-properties fo:margin-left="0.000000000000000pt" style:width="172.800299356799997pt" table:align="left" table:border-model="collapsing"/>
    </style:style>
    <style:style style:name="Table3" style:family="table">
      <style:table-properties fo:margin-left="0.000000000000000pt" style:width="170.957776479799975pt" table:align="left" table:border-model="collapsing"/>
    </style:style>
    <style:style style:name="Table4" style:family="table">
      <style:table-properties fo:margin-left="0.000000000000000pt" style:width="502.300082775999954pt" table:align="left" table:border-model="collapsing"/>
    </style:style>
    <style:style style:name="Table5" style:family="table">
      <style:table-properties fo:margin-left="0.000000000000000pt" style:width="200.154677453799991pt" table:align="left" table:border-model="collapsing"/>
    </style:style>
    <style:style style:name="Table6" style:family="table">
      <style:table-properties fo:margin-left="0.000000000000000pt" style:width="342.142325006000021pt" table:align="left" table:border-model="collapsing"/>
    </style:style>
    <style:style style:name="Table7" style:family="table">
      <style:table-properties fo:margin-left="0.000000000000000pt" style:width="310.394238509999980pt" table:align="left" table:border-model="collapsing"/>
    </style:style>
    <style:style style:name="Table1.A" style:family="table-column">
      <style:table-column-properties style:column-width="84.954477882599988pt"/>
    </style:style>
    <style:style style:name="Table2.A" style:family="table-column">
      <style:table-column-properties style:column-width="58.252069419000001pt"/>
    </style:style>
    <style:style style:name="Table2.B" style:family="table-column">
      <style:table-column-properties style:column-width="56.296160518800001pt"/>
    </style:style>
    <style:style style:name="Table3.A" style:family="table-column">
      <style:table-column-properties style:column-width="78.208009502199999pt"/>
    </style:style>
    <style:style style:name="Table3.B" style:family="table-column">
      <style:table-column-properties style:column-width="92.749766977599990pt"/>
    </style:style>
    <style:style style:name="Table4.A" style:family="table-column">
      <style:table-column-properties style:column-width="246.274442390399997pt"/>
    </style:style>
    <style:style style:name="Table4.B" style:family="table-column">
      <style:table-column-properties style:column-width="141.222291895599994pt"/>
    </style:style>
    <style:style style:name="Table4.C" style:family="table-column">
      <style:table-column-properties style:column-width="114.718308972599985pt"/>
    </style:style>
    <style:style style:name="Table4.A1" style:family="table-column">
      <style:table-column-properties style:column-width="246.926412023799998pt"/>
    </style:style>
    <style:style style:name="Table4.B1" style:family="table-column">
      <style:table-column-properties style:column-width="140.570322262199994pt"/>
    </style:style>
    <style:style style:name="Table5.A" style:family="table-column">
      <style:table-column-properties style:column-width="49.861503702199997pt"/>
    </style:style>
    <style:style style:name="Table5.B" style:family="table-column">
      <style:table-column-properties style:column-width="50.598512852999995pt"/>
    </style:style>
    <style:style style:name="Table6.A" style:family="table-column">
      <style:table-column-properties style:column-width="342.142325006000021pt"/>
    </style:style>
    <style:style style:name="Table7.A" style:family="table-column">
      <style:table-column-properties style:column-width="310.394238509999980pt"/>
    </style:style>
    <style:style style:name="Table1.1" style:family="table-row">
      <style:table-row-properties fo:keep-together="auto"/>
    </style:style>
    <style:style style:name="Table1.A1" style:family="table-cell">
      <style:table-cell-properties calligra:specialborder-bottom="solid" calligra:specialborder-left="solid" calligra:specialborder-right="none" calligra:specialborder-top="solid" fo:border-bottom="0.500032pt solid #000000" fo:border-left="0.500032pt solid #000000" fo:border-right="0pt none #000000" fo:border-top="0.500032pt solid #000000" fo:padding="2.750177992716000pt" style:diagonal-bl-tr="0pt none #000000" style:diagonal-tl-br="0pt none #000000"/>
    </style:style>
    <style:style style:name="Table1.F1" style:family="table-cell">
      <style:table-cell-properties calligra:specialborder-bottom="solid" calligra:specialborder-left="solid" calligra:specialborder-right="solid" calligra:specialborder-top="solid" fo:border="0.500032pt solid #000000" fo:padding="2.750177992716000pt" style:diagonal-bl-tr="0pt none #000000" style:diagonal-tl-br="0pt none #000000"/>
    </style:style>
    <style:style style:name="Table1.A2" style:family="table-cell">
      <style:table-cell-properties calligra:specialborder-bottom="solid" calligra:specialborder-left="solid" calligra:specialborder-right="none" calligra:specialborder-top="none" fo:border-bottom="0.500032pt solid #000000" fo:border-left="0.500032pt solid #000000" fo:border-right="0pt none #000000" fo:border-top="0pt none #000000" fo:padding="2.750177992716000pt" style:diagonal-bl-tr="0pt none #000000" style:diagonal-tl-br="0pt none #000000"/>
    </style:style>
    <style:style style:name="Table1.F2" style:family="table-cell">
      <style:table-cell-properties calligra:specialborder-bottom="solid" calligra:specialborder-left="solid" calligra:specialborder-right="solid" calligra:specialborder-top="none" fo:border-bottom="0.500032pt solid #000000" fo:border-left="0.500032pt solid #000000" fo:border-right="0.500032pt solid #000000" fo:border-top="0pt none #000000" fo:padding="2.750177992716000pt" style:diagonal-bl-tr="0pt none #000000" style:diagonal-tl-br="0pt none #000000"/>
    </style:style>
    <style:style style:name="Table6.A1" style:family="table-cell">
      <style:table-cell-properties calligra:specialborder-bottom="none" calligra:specialborder-left="none" calligra:specialborder-right="solid" calligra:specialborder-top="none" fo:border-bottom="0pt none #000000" fo:border-left="0pt none #000000" fo:border-right="0.250016pt solid #000000" fo:border-top="0pt none #000000" fo:padding-bottom="0.000000000000000pt" fo:padding-left="0.000000000000000pt" fo:padding-right="1.400033921462000pt" fo:padding-top="0.000000000000000pt" style:diagonal-bl-tr="0pt none #000000" style:diagonal-tl-br="0pt none #000000" style:vertical-align="middle"/>
    </style:style>
    <style:style style:name="gr1" style:family="graphic">
      <style:graphic-properties draw:auto-grow-height="false" draw:auto-grow-width="false" draw:fill="solid" draw:fill-color="#729fcf" draw:stroke="solid" draw:stroke-linejoin="bevel" draw:textarea-horizontal-align="left" draw:textarea-vertical-align="top" fo:margin="0.000000000000000pt" style:flow-with-text="false" style:horizontal-pos="from-left" style:horizontal-rel="char" style:vertical-pos="from-top" style:vertical-rel="paragraph" style:wrap="run-through" style:wrap-contour="false" style:wrap-dynamic-threshold="0.000000000000000pt" svg:fill-rule="nonzero" svg:stroke-color="#3465a4" svg:stroke-linecap="butt" svg:stroke-opacity="1" svg:stroke-width="1.000064724624000pt"/>
    </style:style>
    <style:style style:name="gr2" style:family="graphic">
      <style:graphic-properties draw:auto-grow-height="false" draw:auto-grow-width="false" draw:fill="none" draw:stroke="solid" draw:stroke-linejoin="bevel" draw:textarea-horizontal-align="left" draw:textarea-vertical-align="top" fo:margin="0.000000000000000pt" style:flow-with-text="false" style:horizontal-pos="from-left" style:horizontal-rel="char" style:vertical-pos="from-top" style:vertical-rel="paragraph" style:wrap="run-through" style:wrap-contour="false" style:wrap-dynamic-threshold="0.000000000000000pt" svg:fill-rule="nonzero" svg:stroke-color="#3465a4" svg:stroke-linecap="butt" svg:stroke-opacity="1" svg:stroke-width="1.000064724624000pt"/>
    </style:style>
    <style:style style:name="gr3" style:family="graphic">
      <style:graphic-properties draw:auto-grow-height="false" draw:fill="none" draw:stroke="none" draw:textarea-vertical-align="top" fo:margin="0.000000000000000pt" fo:padding="0.000000000000000pt" style:flow-with-text="false" style:horizontal-pos="from-left" style:horizontal-rel="char" style:vertical-pos="from-top" style:vertical-rel="paragraph" style:wrap="run-through" style:wrap-contour="false" style:wrap-dynamic-threshold="0.000000000000000pt"/>
    </style:style>
    <style:style style:name="gr4" style:family="graphic">
      <style:graphic-properties calligra:specialborder-bottom="solid" calligra:specialborder-left="solid" calligra:specialborder-right="solid" calligra:specialborder-top="solid" draw:auto-grow-height="false" draw:fill="solid" draw:fill-color="#729fcf" draw:stroke="solid" draw:stroke-linejoin="bevel" draw:textarea-vertical-align="middle" fo:border="1.00006pt solid #3465a4" fo:margin="0.000000000000000pt" fo:padding="0.000000000000000pt" style:diagonal-bl-tr="0pt none #000000" style:diagonal-tl-br="0pt none #000000" style:flow-with-text="false" style:horizontal-pos="from-left" style:horizontal-rel="char" style:vertical-pos="from-top" style:vertical-rel="paragraph" style:wrap="run-through" style:wrap-contour="false" style:wrap-dynamic-threshold="0.000000000000000pt" svg:stroke-color="#3465a4" svg:stroke-linecap="butt" svg:stroke-opacity="1" svg:stroke-width="1.000064724624000pt"/>
    </style:style>
    <style:style style:name="gr5" style:family="graphic">
      <style:graphic-properties draw:auto-grow-height="false" draw:auto-grow-width="false" draw:fill="solid" draw:fill-color="#729fcf" draw:stroke="solid" draw:stroke-linejoin="bevel" draw:textarea-horizontal-align="center" draw:textarea-vertical-align="middle" fo:margin="0.000000000000000pt" style:flow-with-text="false" style:horizontal-pos="from-left" style:horizontal-rel="char" style:vertical-pos="from-top" style:vertical-rel="paragraph" style:wrap="run-through" style:wrap-contour="false" style:wrap-dynamic-threshold="0.000000000000000pt" svg:fill-rule="nonzero" svg:stroke-color="#3465a4" svg:stroke-linecap="butt" svg:stroke-opacity="1" svg:stroke-width="1.000064724624000pt"/>
    </style:style>
    <style:style style:name="gr6" style:family="graphic">
      <style:graphic-properties draw:auto-grow-height="false" draw:auto-grow-width="false" draw:fill="solid" draw:fill-color="#729fcf" draw:stroke="solid" draw:stroke-linejoin="bevel" draw:textarea-horizontal-align="left" draw:textarea-vertical-align="middle" fo:margin="0.000000000000000pt" style:flow-with-text="false" style:horizontal-pos="from-left" style:horizontal-rel="char" style:vertical-pos="from-top" style:vertical-rel="paragraph" style:wrap="run-through" style:wrap-contour="false" style:wrap-dynamic-threshold="0.000000000000000pt" svg:fill-rule="nonzero" svg:stroke-color="#3465a4" svg:stroke-linecap="butt" svg:stroke-opacity="1" svg:stroke-width="1.000064724624000pt"/>
    </style:style>
    <style:style style:name="gr7"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false" style:horizontal-pos="left" style:horizontal-rel="char" style:vertical-pos="middle" style:vertical-rel="baseline" style:wrap="run-through" style:wrap-contour="false" style:wrap-dynamic-threshold="0.000000000000000pt"/>
    </style:style>
  </office:automatic-styles>
  <office:body>
    <office:text>
      <text:tracked-changes text:track-changes="false"/>
      <text:p text:style-name="P1">,,</text:p>
      <text:p text:style-name="P2"><text:span text:style-name="T37">LENGUAJES Y AUTÓMATAS II</text:span></text:p>
      <text:p text:style-name="P2"><text:span text:style-name="T38"/></text:p>
      <text:p text:style-name="P2"><text:span text:style-name="T38">RESOLVER PROBLEMAS<text:s/></text:span></text:p>
      <text:p text:style-name="P2"><text:span text:style-name="T38"/></text:p>
      <text:p text:style-name="P3"><text:span text:style-name="T38">No se van a definir el concepto de<text:s/></text:span><text:span text:style-name="T39">“Problema”,<text:s/></text:span><text:span text:style-name="T38">ya que esto es muy complejo y se ve en temas de filosofía. Aun así, se podría definir como una cuestión difícil de solucionar, es decir que no tiene una solución trivial.</text:span></text:p>
      <text:p text:style-name="P3"><text:span text:style-name="T38"/></text:p>
      <text:p text:style-name="P3"><text:span text:style-name="T38">Todos recordaran el paso por los semestres anteriores y por la primaria donde se tenia que resolver problemas matemáticos, así que vamos a recordar 2 problemas</text:span></text:p>
      <text:p text:style-name="P3"><text:span text:style-name="T38"/></text:p>
      <text:p text:style-name="P2"><text:span text:style-name="T38">Problema 1:<text:s/></text:span><text:span text:style-name="T40">Eduardo tiene 5 paletas. De camino a su casa se le cae una sin que se diera cuenta, al llegar a su casa en las escaleras pierde otra paleta, al entrar a su cuarto se encuentra 3 paletas mas en la mesa de su hermano Kevin. ¿Cuantas paletas tiene ahora Eduardo?</text:span></text:p>
      <text:p text:style-name="P2"><text:span text:style-name="T38"/></text:p>
      <text:p text:style-name="P2"><text:span text:style-name="T38">Problema:<text:s/></text:span><text:span text:style-name="T40">Ordenar en orden descendente la siguiente lista de números: 3,6,1,3,9,4,2</text:span></text:p>
      <text:p text:style-name="P2"><text:span text:style-name="T38"/></text:p>
      <text:p text:style-name="P3"><text:span text:style-name="T38">Son problemas muy simples pero como se enfrenta nuestro cerebro a ello si se ha intentado encontrar la solución de ambos. Es inherente darse cuenta que existen diferentes formas de solucionarlo, a pesar que son de baja dificultad.</text:span></text:p>
      <text:p text:style-name="P2"><text:span text:style-name="T38"/></text:p>
      <text:p text:style-name="P3"><text:span text:style-name="T38">El primer problema, seguramente se ha intentado contextualizar en su situación particular.</text:span></text:p>
      <text:p text:style-name="P3"><text:span text:style-name="T38">Seguramente se han imaginado a Eduardo perdiendo sus paletas y encontrando algunas mas. Y al final se realizar una simple operación de resta y suma.</text:span></text:p>
      <text:p text:style-name="P2"><text:span text:style-name="T38"/></text:p>
      <text:p text:style-name="P3"><text:span text:style-name="T38">Paletas = 5-1-1+3 = 6</text:span></text:p>
      <text:p text:style-name="P2"><text:span text:style-name="T38"/></text:p>
      <text:p text:style-name="P3"><text:span text:style-name="T38">El segundo es un poco distinto ya que la tarea consiste en evaluar mediante comparaciones lógicas y así podemos saber cual va primero y cual va después.</text:span></text:p>
      <text:p text:style-name="P2"><text:span text:style-name="T38"/></text:p>
      <text:p text:style-name="P3"><text:span text:style-name="T38">En ambos casos nuestro cerebro ha recolectado información y le ha dado contexto, el cual es necesario para olvidar todo aquello que genere ruido y traducido a un modelo mental que es capaz de resolver.</text:span></text:p>
      <text:p text:style-name="P2"><text:span text:style-name="T38"/></text:p>
      <text:p text:style-name="P3"><text:span text:style-name="T38">Sin embargo no todos los problemas son sencillos. Es necesario plantear algunos problemas algo mas divertidos, los cuales sentaran la base para seguir indagando en la solución de problemas.</text:span></text:p>
      <text:p text:style-name="P2"><text:span text:style-name="T38"/></text:p>
      <text:p text:style-name="P2"><text:span text:style-name="T38">PROBLEMAS COMPLEJOS</text:span></text:p>
      <text:p text:style-name="P2"><text:span text:style-name="T38"/></text:p>
      <text:p text:style-name="P3"><text:span text:style-name="T38">Es necesario describir algunos problemas que servirán de modelo a seguir durante el resto del curso<text:s/></text:span></text:p>
      <text:p text:style-name="P3"><text:span text:style-name="T38"/></text:p>
      <text:p text:style-name="P3"><text:span text:style-name="T38">Si ustedes han echo algún viaje largo, ya sea en autobús o en avión, seguramente han intentado viajar al destino directamente y sin escalas. Este problema es clásico y con una gran aplicación en la vida real. El problema podría describirse de la siguiente manera: dada una ciudad origen con su ciudad destino, encontrar una combinación de vuelos que permita cubrir la distancia con el mínimo de transbordos. Por ahora tiene sentido obviar en tiempos de vuelo, distancia, horarios de vuelo y todo lo que conlleva viajar.</text:span></text:p>
      <text:p text:style-name="P3"><text:span text:style-name="T38"/></text:p>
      <text:p text:style-name="P3"><text:span text:style-name="T38">Ahora vamos a en listar otro problema en esta ocasión se trata de ir de una ciudad a otra, pero por carretera, tratando de realizar el menor numero de kilómetros posibles. Parece que es un problema similar al de los aviones, solo que en lugar de pasar por aeropuertos, se pasa por diversas ciudades, sin embargo hay un pequeño detalle que hace que el problema sea diferente. Y es que los objetivos son distintos.</text:span></text:p>
      <text:p text:style-name="P3"><text:span text:style-name="T38"/></text:p>
      <text:p text:style-name="P3"><text:span text:style-name="T38"><draw:custom-shape draw:style-name="gr1" xml:id="shape-1" draw:id="shape-1" draw:name="Forma 2" draw:z-index="4" svg:x="38.74967342860pt" svg:y="173.50896200180pt" text:anchor-type="paragraph" svg:width="49.97488972540pt" svg:height="49.97488972540pt"><draw:enhanced-geometry svg:viewBox="0 0 21600 21600" draw:modifiers="" draw:enhanced-path="U10800 10800 10800 10800 0 360 Z N"/><draw:glue-point draw:id="4" svg:x="0.50000000000pt" svg:y="0.50000000000pt" draw:align="center"/><draw:glue-point draw:id="5" svg:x="0.50000000000pt" svg:y="0.50000000000pt" draw:align="center"/></draw:custom-shape><draw:custom-shape draw:style-name="gr1" xml:id="shape-2" draw:id="shape-2" draw:name="Forma 3" draw:z-index="5" svg:x="359.43369354400pt" svg:y="133.65377484700pt" text:anchor-type="paragraph" svg:width="49.97488972540pt" svg:height="49.97488972540pt"><draw:enhanced-geometry svg:viewBox="0 0 21600 21600" draw:modifiers="" draw:enhanced-path="U10800 10800 10800 10800 0 360 Z N"/><draw:glue-point draw:id="4" svg:x="0.50000000000pt" svg:y="0.50000000000pt" draw:align="center"/><draw:glue-point draw:id="5" svg:x="0.50000000000pt" svg:y="0.50000000000pt" draw:align="center"/></draw:custom-shape><draw:custom-shape draw:style-name="gr1" xml:id="shape-3" draw:id="shape-3" draw:name="Forma 4" draw:z-index="6" svg:x="487.55989976000pt" svg:y="204.66177187600pt" text:anchor-type="paragraph" svg:width="49.97488972540pt" svg:height="49.97488972540pt"><draw:enhanced-geometry svg:viewBox="0 0 21600 21600" draw:modifiers="" draw:enhanced-path="U10800 10800 10800 10800 0 360 Z N"/><draw:glue-point draw:id="4" svg:x="0.50000000000pt" svg:y="0.50000000000pt" draw:align="center"/><draw:glue-point draw:id="5" svg:x="0.50000000000pt" svg:y="0.50000000000pt" draw:align="center"/></draw:custom-shape><draw:custom-shape draw:style-name="gr1" xml:id="shape-4" draw:id="shape-4" draw:name="Forma 5" draw:z-index="7" svg:x="460.91418430800pt" svg:y="331.37065280200pt" text:anchor-type="paragraph" svg:width="49.97488972540pt" svg:height="49.97488972540pt"><draw:enhanced-geometry svg:viewBox="0 0 21600 21600" draw:modifiers="" draw:enhanced-path="U10800 10800 10800 10800 0 360 Z N"/><draw:glue-point draw:id="4" svg:x="0.50000000000pt" svg:y="0.50000000000pt" draw:align="center"/><draw:glue-point draw:id="5" svg:x="0.50000000000pt" svg:y="0.50000000000pt" draw:align="center"/></draw:custom-shape><draw:custom-shape draw:style-name="gr1" xml:id="shape-5" draw:id="shape-5" draw:name="Forma 6" draw:z-index="8" svg:x="433.13460862400pt" svg:y="451.55983739400pt" text:anchor-type="paragraph" svg:width="49.97488972540pt" svg:height="49.97488972540pt"><draw:enhanced-geometry svg:viewBox="0 0 21600 21600" draw:modifiers="" draw:enhanced-path="U10800 10800 10800 10800 0 360 Z N"/><draw:glue-point draw:id="4" svg:x="0.50000000000pt" svg:y="0.50000000000pt" draw:align="center"/><draw:glue-point draw:id="5" svg:x="0.50000000000pt" svg:y="0.50000000000pt" draw:align="center"/></draw:custom-shape><draw:custom-shape draw:style-name="gr1" xml:id="shape-6" draw:id="shape-6" draw:name="Forma 7" draw:z-index="9" svg:x="170.19242082320pt" svg:y="286.86663869600pt" text:anchor-type="paragraph" svg:width="49.97488972540pt" svg:height="49.97488972540pt"><draw:enhanced-geometry svg:viewBox="0 0 21600 21600" draw:modifiers="" draw:enhanced-path="U10800 10800 10800 10800 0 360 Z N"/><draw:glue-point draw:id="4" svg:x="0.50000000000pt" svg:y="0.50000000000pt" draw:align="center"/><draw:glue-point draw:id="5" svg:x="0.50000000000pt" svg:y="0.50000000000pt" draw:align="center"/></draw:custom-shape><draw:custom-shape draw:style-name="gr1" xml:id="shape-7" draw:id="shape-7" draw:name="Forma 8" draw:z-index="10" svg:x="257.18784712340pt" svg:y="388.63059451800pt" text:anchor-type="paragraph" svg:width="49.97488972540pt" svg:height="49.97488972540pt"><draw:enhanced-geometry svg:viewBox="0 0 21600 21600" draw:modifiers="" draw:enhanced-path="U10800 10800 10800 10800 0 360 Z N"/><draw:glue-point draw:id="4" svg:x="0.50000000000pt" svg:y="0.50000000000pt" draw:align="center"/><draw:glue-point draw:id="5" svg:x="0.50000000000pt" svg:y="0.50000000000pt" draw:align="center"/></draw:custom-shape><draw:custom-shape draw:style-name="gr1" xml:id="shape-8" draw:id="shape-8" draw:name="Forma 9" draw:z-index="11" svg:x="261.12801142960pt" svg:y="515.33947544400pt" text:anchor-type="paragraph" svg:width="49.97488972540pt" svg:height="49.97488972540pt"><draw:enhanced-geometry svg:viewBox="0 0 21600 21600" draw:modifiers="" draw:enhanced-path="U10800 10800 10800 10800 0 360 Z N"/><draw:glue-point draw:id="4" svg:x="0.50000000000pt" svg:y="0.50000000000pt" draw:align="center"/><draw:glue-point draw:id="5" svg:x="0.50000000000pt" svg:y="0.50000000000pt" draw:align="center"/></draw:custom-shape><draw:custom-shape draw:style-name="gr1" xml:id="shape-9" draw:id="shape-9" draw:name="Forma 10" draw:z-index="12" svg:x="91.19070915860pt" svg:y="424.34719182600pt" text:anchor-type="paragraph" svg:width="49.97488972540pt" svg:height="49.97488972540pt"><draw:enhanced-geometry svg:viewBox="0 0 21600 21600" draw:modifiers="" draw:enhanced-path="U10800 10800 10800 10800 0 360 Z N"/><draw:glue-point draw:id="4" svg:x="0.50000000000pt" svg:y="0.50000000000pt" draw:align="center"/><draw:glue-point draw:id="5" svg:x="0.50000000000pt" svg:y="0.50000000000pt" draw:align="center"/></draw:custom-shape><draw:path draw:style-name="gr2" xml:id="shape-10" draw:id="shape-10" draw:name="Línea horizontal 1" draw:z-index="13" svg:width="123.47737926480pt" svg:height="81.01431357640pt" svg:x="81.04266008220pt" svg:y="94.84740840680pt" svg:viewBox="0 0 123 81" text:anchor-type="paragraph" svg:d="M0 81.0143L123.477 0" calligra:nodeTypes="cc"><draw:glue-point draw:id="4" svg:x="0.50000000000pt" svg:y="0.50000000000pt" draw:align="center"/><draw:glue-point draw:id="5" svg:x="0.50000000000pt" svg:y="0.50000000000pt" draw:align="center"/></draw:path><draw:path draw:style-name="gr2" xml:id="shape-11" draw:id="shape-11" draw:name="Línea horizontal 2" draw:z-index="14" svg:width="398.86368311180pt" svg:height="31.80477950760pt" svg:x="88.69621664820pt" svg:y="198.45388710580pt" svg:viewBox="0 0 399 32" text:anchor-type="paragraph" svg:d="M0 0L398.864 31.8048" calligra:nodeTypes="cc"><draw:glue-point draw:id="4" svg:x="0.50000000000pt" svg:y="0.50000000000pt" draw:align="center"/><draw:glue-point draw:id="5" svg:x="0.50000000000pt" svg:y="0.50000000000pt" draw:align="center"/></draw:path><draw:path draw:style-name="gr2" xml:id="shape-12" draw:id="shape-12" draw:name="Línea horizontal 3" draw:z-index="15" svg:width="88.44109809600pt" svg:height="41.15912642160pt" svg:x="402.23691730200pt" svg:y="175.15305933820pt" svg:viewBox="0 0 88 41" text:anchor-type="paragraph" svg:d="M0 0L88.4411 41.1591" calligra:nodeTypes="cc"><draw:glue-point draw:id="4" svg:x="0.50000000000pt" svg:y="0.50000000000pt" draw:align="center"/><draw:glue-point draw:id="5" svg:x="0.50000000000pt" svg:y="0.50000000000pt" draw:align="center"/></draw:path><draw:path draw:style-name="gr2" xml:id="shape-13" draw:id="shape-13" draw:name="Línea horizontal 4" draw:z-index="16" svg:width="18.99215888600pt" svg:height="76.73399120060pt" svg:x="486.70950458600pt" svg:y="254.63666160140pt" svg:viewBox="0 0 19 77" text:anchor-type="paragraph" svg:d="M18.9922 0L0 76.734" calligra:nodeTypes="cc"><draw:glue-point draw:id="4" svg:x="0.50000000000pt" svg:y="0.50000000000pt" draw:align="center"/><draw:glue-point draw:id="5" svg:x="0.50000000000pt" svg:y="0.50000000000pt" draw:align="center"/></draw:path><draw:path draw:style-name="gr2" xml:id="shape-14" draw:id="shape-14" draw:name="Línea horizontal 5" draw:z-index="17" svg:width="16.44097336400pt" svg:height="70.01586932600pt" svg:x="462.04804454000pt" svg:y="381.54396806800pt" svg:viewBox="0 0 16 70" text:anchor-type="paragraph" svg:d="M0 70.0159L16.441 0" calligra:nodeTypes="cc"><draw:glue-point draw:id="4" svg:x="0.50000000000pt" svg:y="0.50000000000pt" draw:align="center"/><draw:glue-point draw:id="5" svg:x="0.50000000000pt" svg:y="0.50000000000pt" draw:align="center"/></draw:path><draw:path draw:style-name="gr2" xml:id="shape-15" draw:id="shape-15" draw:name="Línea horizontal 6" draw:z-index="18" svg:width="189.07119368600pt" svg:height="270.87920942480pt" svg:x="302.74068194400pt" svg:y="249.27917200520pt" svg:viewBox="0 0 189 271" text:anchor-type="paragraph" svg:d="M0 270.879L189.071 0" calligra:nodeTypes="cc"><draw:glue-point draw:id="4" svg:x="0.50000000000pt" svg:y="0.50000000000pt" draw:align="center"/><draw:glue-point draw:id="5" svg:x="0.50000000000pt" svg:y="0.50000000000pt" draw:align="center"/></draw:path><draw:path draw:style-name="gr2" xml:id="shape-16" draw:id="shape-16" draw:name="Línea horizontal 7" draw:z-index="19" svg:width="0.99212770300pt" svg:height="73.70091508000pt" svg:x="280.82883296060pt" svg:y="438.52044472600pt" svg:viewBox="0 0 1 74" text:anchor-type="paragraph" svg:d="M0 73.7009L0.992128 0" calligra:nodeTypes="cc"><draw:glue-point draw:id="4" svg:x="0.50000000000pt" svg:y="0.50000000000pt" draw:align="center"/><draw:glue-point draw:id="5" svg:x="0.50000000000pt" svg:y="0.50000000000pt" draw:align="center"/></draw:path><draw:path draw:style-name="gr2" xml:id="shape-17" draw:id="shape-17" draw:name="Línea horizontal 8" draw:z-index="20" svg:width="52.41268922420pt" svg:height="62.92924287600pt" svg:x="212.48540747680pt" svg:y="329.10293233800pt" svg:viewBox="0 0 52 63" text:anchor-type="paragraph" svg:d="M0 0L52.4127 62.9292" calligra:nodeTypes="cc"><draw:glue-point draw:id="4" svg:x="0.50000000000pt" svg:y="0.50000000000pt" draw:align="center"/><draw:glue-point draw:id="5" svg:x="0.50000000000pt" svg:y="0.50000000000pt" draw:align="center"/></draw:path><draw:path draw:style-name="gr2" xml:id="shape-18" draw:id="shape-18" draw:name="Línea horizontal 9" draw:z-index="21" svg:width="70.38437390140pt" svg:height="183.68535758400pt" svg:x="197.85861048400pt" svg:y="337.03995396200pt" svg:viewBox="0 0 70 184" text:anchor-type="paragraph" svg:d="M70.3844 183.685L0 0" calligra:nodeTypes="cc"><draw:glue-point draw:id="4" svg:x="0.50000000000pt" svg:y="0.50000000000pt" draw:align="center"/><draw:glue-point draw:id="5" svg:x="0.50000000000pt" svg:y="0.50000000000pt" draw:align="center"/></draw:path><draw:path draw:style-name="gr2" xml:id="shape-19" draw:id="shape-19" draw:name="Línea horizontal 10" draw:z-index="22" svg:width="42.46306568840pt" svg:height="204.29326730060pt" svg:x="61.79538264400pt" svg:y="223.45550522140pt" svg:viewBox="0 0 42 204" text:anchor-type="paragraph" svg:d="M42.4631 204.293L0 0" calligra:nodeTypes="cc"><draw:glue-point draw:id="4" svg:x="0.50000000000pt" svg:y="0.50000000000pt" draw:align="center"/><draw:glue-point draw:id="5" svg:x="0.50000000000pt" svg:y="0.50000000000pt" draw:align="center"/></draw:path><draw:path draw:style-name="gr2" xml:id="shape-20" draw:id="shape-20" draw:name="Línea horizontal 11" draw:z-index="23" svg:width="116.02224823940pt" svg:height="37.13392259800pt" svg:x="141.13725237820pt" svg:y="420.66214607200pt" svg:viewBox="0 0 116 37" text:anchor-type="paragraph" svg:d="M0 37.1339L116.022 0" calligra:nodeTypes="cc"><draw:glue-point draw:id="4" svg:x="0.50000000000pt" svg:y="0.50000000000pt" draw:align="center"/><draw:glue-point draw:id="5" svg:x="0.50000000000pt" svg:y="0.50000000000pt" draw:align="center"/></draw:path><draw:path draw:style-name="gr2" xml:id="shape-21" draw:id="shape-21" draw:name="Línea horizontal 12" draw:z-index="24" svg:width="45.80795337280pt" svg:height="278.78788454300pt" svg:x="232.38465454840pt" svg:y="105.30726904700pt" svg:viewBox="0 0 46 279" text:anchor-type="paragraph" svg:d="M45.808 278.788L0 0" calligra:nodeTypes="cc"><draw:glue-point draw:id="4" svg:x="0.50000000000pt" svg:y="0.50000000000pt" draw:align="center"/><draw:glue-point draw:id="5" svg:x="0.50000000000pt" svg:y="0.50000000000pt" draw:align="center"/></draw:path><draw:path draw:style-name="gr2" xml:id="shape-22" draw:id="shape-22" draw:name="Línea horizontal 13" draw:z-index="25" svg:width="192.75623944000pt" svg:height="152.73097325040pt" svg:x="294.80366032000pt" svg:y="238.73427184760pt" svg:viewBox="0 0 193 153" text:anchor-type="paragraph" svg:d="M0 152.731L192.756 0" calligra:nodeTypes="cc"><draw:glue-point draw:id="4" svg:x="0.50000000000pt" svg:y="0.50000000000pt" draw:align="center"/><draw:glue-point draw:id="5" svg:x="0.50000000000pt" svg:y="0.50000000000pt" draw:align="center"/></draw:path><draw:frame draw:style-name="gr3" xml:id="shape-23" draw:id="shape-23" draw:name="Marco de texto 1" draw:z-index="26" svg:width="49.97488972540pt" svg:height="49.97488972540pt" svg:x="249.39255802840pt" svg:y="64.60168671820pt" text:anchor-type="paragraph"><draw:text-box><text:p text:style-name="P4">Jiloyork</text:p></draw:text-box><draw:glue-point draw:id="4" svg:x="0.50000000000pt" svg:y="0.50000000000pt" draw:align="center"/><draw:glue-point draw:id="5" svg:x="0.50000000000pt" svg:y="0.50000000000pt" draw:align="center"/></draw:frame><draw:frame draw:style-name="gr3" xml:id="shape-24" draw:id="shape-24" draw:name="Marco de texto 2" draw:z-index="27" svg:width="49.97488972540pt" svg:height="49.97488972540pt" svg:x="88.69621664820pt" svg:y="173.50896200180pt" text:anchor-type="paragraph"><draw:text-box><text:p text:style-name="P4">Hidalgo</text:p></draw:text-box><draw:glue-point draw:id="4" svg:x="0.50000000000pt" svg:y="0.50000000000pt" draw:align="center"/><draw:glue-point draw:id="5" svg:x="0.50000000000pt" svg:y="0.50000000000pt" draw:align="center"/></draw:frame><draw:frame draw:style-name="gr3" xml:id="shape-25" draw:id="shape-25" draw:name="Marco de texto 3" draw:z-index="28" svg:width="49.97488972540pt" svg:height="49.97488972540pt" svg:x="413.29205456400pt" svg:y="139.60654106500pt" text:anchor-type="paragraph"><draw:text-box><text:p text:style-name="P4">QRO</text:p></draw:text-box><draw:glue-point draw:id="4" svg:x="0.50000000000pt" svg:y="0.50000000000pt" draw:align="center"/><draw:glue-point draw:id="5" svg:x="0.50000000000pt" svg:y="0.50000000000pt" draw:align="center"/></draw:frame><draw:frame draw:style-name="gr3" xml:id="shape-26" draw:id="shape-26" draw:name="Marco de texto 4" draw:z-index="29" svg:width="49.97488972540pt" svg:height="49.97488972540pt" svg:x="490.67801539800pt" svg:y="175.15305933820pt" text:anchor-type="paragraph"><draw:text-box><text:p text:style-name="P4">SLP</text:p></draw:text-box><draw:glue-point draw:id="4" svg:x="0.50000000000pt" svg:y="0.50000000000pt" draw:align="center"/><draw:glue-point draw:id="5" svg:x="0.50000000000pt" svg:y="0.50000000000pt" draw:align="center"/></draw:frame><draw:frame draw:style-name="gr3" xml:id="shape-27" draw:id="shape-27" draw:name="Marco de texto 5" draw:z-index="30" svg:width="49.97488972540pt" svg:height="49.97488972540pt" svg:x="182.40976482300pt" svg:y="264.38785959660pt" text:anchor-type="paragraph"><draw:text-box><text:p text:style-name="P4">Morelos</text:p></draw:text-box><draw:glue-point draw:id="4" svg:x="0.50000000000pt" svg:y="0.50000000000pt" draw:align="center"/><draw:glue-point draw:id="5" svg:x="0.50000000000pt" svg:y="0.50000000000pt" draw:align="center"/></draw:frame><draw:frame draw:style-name="gr3" xml:id="shape-28" draw:id="shape-28" draw:name="Marco de texto 6" draw:z-index="31" svg:width="49.97488972540pt" svg:height="49.97488972540pt" svg:x="460.91418430800pt" svg:y="308.97691322000pt" text:anchor-type="paragraph"><draw:text-box><text:p text:style-name="P4">Zacatecas</text:p></draw:text-box><draw:glue-point draw:id="4" svg:x="0.50000000000pt" svg:y="0.50000000000pt" draw:align="center"/><draw:glue-point draw:id="5" svg:x="0.50000000000pt" svg:y="0.50000000000pt" draw:align="center"/></draw:frame><draw:frame draw:style-name="gr3" xml:id="shape-29" draw:id="shape-29" draw:name="Marco de texto 7" draw:z-index="32" svg:width="49.97488972540pt" svg:height="49.97488972540pt" svg:x="261.97840660360pt" svg:y="363.96913447200pt" text:anchor-type="paragraph"><draw:text-box><text:p text:style-name="P4">CDMX</text:p></draw:text-box><draw:glue-point draw:id="4" svg:x="0.50000000000pt" svg:y="0.50000000000pt" draw:align="center"/><draw:glue-point draw:id="5" svg:x="0.50000000000pt" svg:y="0.50000000000pt" draw:align="center"/></draw:frame><draw:frame draw:style-name="gr3" xml:id="shape-30" draw:id="shape-30" draw:name="Marco de texto 8" draw:z-index="33" svg:width="49.97488972540pt" svg:height="49.97488972540pt" svg:x="483.02445883200pt" svg:y="470.26853122200pt" text:anchor-type="paragraph"><draw:text-box><text:p text:style-name="P4">GDL</text:p></draw:text-box><draw:glue-point draw:id="4" svg:x="0.50000000000pt" svg:y="0.50000000000pt" draw:align="center"/><draw:glue-point draw:id="5" svg:x="0.50000000000pt" svg:y="0.50000000000pt" draw:align="center"/></draw:frame><draw:frame draw:style-name="gr3" xml:id="shape-31" draw:id="shape-31" draw:name="Marco de texto 9" draw:z-index="34" svg:width="69.95917631440pt" svg:height="49.97488972540pt" svg:x="319.74858542400pt" svg:y="527.24500788000pt" text:anchor-type="paragraph"><draw:text-box><text:p text:style-name="P4">Tamaulipas</text:p></draw:text-box><draw:glue-point draw:id="4" svg:x="0.50000000000pt" svg:y="0.50000000000pt" draw:align="center"/><draw:glue-point draw:id="5" svg:x="0.50000000000pt" svg:y="0.50000000000pt" draw:align="center"/></draw:frame><draw:frame draw:style-name="gr3" xml:id="shape-32" draw:id="shape-32" draw:name="Marco de texto 10" draw:z-index="35" svg:width="60.71821542360pt" svg:height="49.97488972540pt" svg:x="124.55454648520pt" svg:y="407.90621846200pt" text:anchor-type="paragraph"><draw:text-box><text:p text:style-name="P4">Monterrey</text:p></draw:text-box><draw:glue-point draw:id="4" svg:x="0.50000000000pt" svg:y="0.50000000000pt" draw:align="center"/><draw:glue-point draw:id="5" svg:x="0.50000000000pt" svg:y="0.50000000000pt" draw:align="center"/></draw:frame>En el primer problema se tenia como objetivo: minimizar el numero de transbordos. En el segundo se trata de minimizar la distancia por carretera.<text:s/></text:span></text:p>
      <text:p text:style-name="P5"><text:span text:style-name="T38"><draw:custom-shape draw:style-name="gr1" xml:id="shape-33" draw:id="shape-33" draw:name="Forma 12" draw:z-index="37" svg:x="38.74967342860pt" svg:y="173.50896200180pt" text:anchor-type="paragraph" svg:width="49.97488972540pt" svg:height="49.97488972540pt"><draw:enhanced-geometry svg:viewBox="0 0 21600 21600" draw:modifiers="" draw:enhanced-path="U10800 10800 10800 10800 0 360 Z N"/><draw:glue-point draw:id="4" svg:x="0.50000000000pt" svg:y="0.50000000000pt" draw:align="center"/><draw:glue-point draw:id="5" svg:x="0.50000000000pt" svg:y="0.50000000000pt" draw:align="center"/></draw:custom-shape><draw:custom-shape draw:style-name="gr1" xml:id="shape-34" draw:id="shape-34" draw:name="Forma 13" draw:z-index="38" svg:x="359.43369354400pt" svg:y="133.65377484700pt" text:anchor-type="paragraph" svg:width="49.97488972540pt" svg:height="49.97488972540pt"><draw:enhanced-geometry svg:viewBox="0 0 21600 21600" draw:modifiers="" draw:enhanced-path="U10800 10800 10800 10800 0 360 Z N"/><draw:glue-point draw:id="4" svg:x="0.50000000000pt" svg:y="0.50000000000pt" draw:align="center"/><draw:glue-point draw:id="5" svg:x="0.50000000000pt" svg:y="0.50000000000pt" draw:align="center"/></draw:custom-shape><draw:custom-shape draw:style-name="gr1" xml:id="shape-35" draw:id="shape-35" draw:name="Forma 14" draw:z-index="39" svg:x="487.55989976000pt" svg:y="204.66177187600pt" text:anchor-type="paragraph" svg:width="49.97488972540pt" svg:height="49.97488972540pt"><draw:enhanced-geometry svg:viewBox="0 0 21600 21600" draw:modifiers="" draw:enhanced-path="U10800 10800 10800 10800 0 360 Z N"/><draw:glue-point draw:id="4" svg:x="0.50000000000pt" svg:y="0.50000000000pt" draw:align="center"/><draw:glue-point draw:id="5" svg:x="0.50000000000pt" svg:y="0.50000000000pt" draw:align="center"/></draw:custom-shape><draw:custom-shape draw:style-name="gr1" xml:id="shape-36" draw:id="shape-36" draw:name="Forma 15" draw:z-index="40" svg:x="460.91418430800pt" svg:y="331.37065280200pt" text:anchor-type="paragraph" svg:width="49.97488972540pt" svg:height="49.97488972540pt"><draw:enhanced-geometry svg:viewBox="0 0 21600 21600" draw:modifiers="" draw:enhanced-path="U10800 10800 10800 10800 0 360 Z N"/><draw:glue-point draw:id="4" svg:x="0.50000000000pt" svg:y="0.50000000000pt" draw:align="center"/><draw:glue-point draw:id="5" svg:x="0.50000000000pt" svg:y="0.50000000000pt" draw:align="center"/></draw:custom-shape><draw:custom-shape draw:style-name="gr1" xml:id="shape-37" draw:id="shape-37" draw:name="Forma 16" draw:z-index="41" svg:x="433.13460862400pt" svg:y="451.55983739400pt" text:anchor-type="paragraph" svg:width="49.97488972540pt" svg:height="49.97488972540pt"><draw:enhanced-geometry svg:viewBox="0 0 21600 21600" draw:modifiers="" draw:enhanced-path="U10800 10800 10800 10800 0 360 Z N"/><draw:glue-point draw:id="4" svg:x="0.50000000000pt" svg:y="0.50000000000pt" draw:align="center"/><draw:glue-point draw:id="5" svg:x="0.50000000000pt" svg:y="0.50000000000pt" draw:align="center"/></draw:custom-shape><draw:custom-shape draw:style-name="gr1" xml:id="shape-38" draw:id="shape-38" draw:name="Forma 17" draw:z-index="42" svg:x="117.21280148300pt" svg:y="317.48086496000pt" text:anchor-type="paragraph" svg:width="49.97488972540pt" svg:height="49.97488972540pt"><draw:enhanced-geometry svg:viewBox="0 0 21600 21600" draw:modifiers="" draw:enhanced-path="U10800 10800 10800 10800 0 360 Z N"/><draw:glue-point draw:id="4" svg:x="0.50000000000pt" svg:y="0.50000000000pt" draw:align="center"/><draw:glue-point draw:id="5" svg:x="0.50000000000pt" svg:y="0.50000000000pt" draw:align="center"/></draw:custom-shape><draw:custom-shape draw:style-name="gr1" xml:id="shape-39" draw:id="shape-39" draw:name="Forma 18" draw:z-index="43" svg:x="257.18784712340pt" svg:y="388.63059451800pt" text:anchor-type="paragraph" svg:width="49.97488972540pt" svg:height="49.97488972540pt"><draw:enhanced-geometry svg:viewBox="0 0 21600 21600" draw:modifiers="" draw:enhanced-path="U10800 10800 10800 10800 0 360 Z N"/><draw:glue-point draw:id="4" svg:x="0.50000000000pt" svg:y="0.50000000000pt" draw:align="center"/><draw:glue-point draw:id="5" svg:x="0.50000000000pt" svg:y="0.50000000000pt" draw:align="center"/></draw:custom-shape><draw:custom-shape draw:style-name="gr1" xml:id="shape-40" draw:id="shape-40" draw:name="Forma 19" draw:z-index="44" svg:x="261.12801142960pt" svg:y="515.33947544400pt" text:anchor-type="paragraph" svg:width="49.97488972540pt" svg:height="49.97488972540pt"><draw:enhanced-geometry svg:viewBox="0 0 21600 21600" draw:modifiers="" draw:enhanced-path="U10800 10800 10800 10800 0 360 Z N"/><draw:glue-point draw:id="4" svg:x="0.50000000000pt" svg:y="0.50000000000pt" draw:align="center"/><draw:glue-point draw:id="5" svg:x="0.50000000000pt" svg:y="0.50000000000pt" draw:align="center"/></draw:custom-shape><draw:custom-shape draw:style-name="gr1" xml:id="shape-41" draw:id="shape-41" draw:name="Forma 20" draw:z-index="45" svg:x="91.19070915860pt" svg:y="424.34719182600pt" text:anchor-type="paragraph" svg:width="49.97488972540pt" svg:height="49.97488972540pt"><draw:enhanced-geometry svg:viewBox="0 0 21600 21600" draw:modifiers="" draw:enhanced-path="U10800 10800 10800 10800 0 360 Z N"/><draw:glue-point draw:id="4" svg:x="0.50000000000pt" svg:y="0.50000000000pt" draw:align="center"/><draw:glue-point draw:id="5" svg:x="0.50000000000pt" svg:y="0.50000000000pt" draw:align="center"/></draw:custom-shape><draw:frame draw:style-name="gr3" xml:id="shape-42" draw:id="shape-42" draw:name="Marco de texto 11" draw:z-index="46" svg:width="49.97488972540pt" svg:height="49.97488972540pt" svg:x="249.39255802840pt" svg:y="64.60168671820pt" text:anchor-type="paragraph"><draw:text-box><text:p text:style-name="P4">Jiloyork</text:p></draw:text-box><draw:glue-point draw:id="4" svg:x="0.50000000000pt" svg:y="0.50000000000pt" draw:align="center"/><draw:glue-point draw:id="5" svg:x="0.50000000000pt" svg:y="0.50000000000pt" draw:align="center"/></draw:frame><draw:frame draw:style-name="gr3" xml:id="shape-43" draw:id="shape-43" draw:name="Marco de texto 12" draw:z-index="47" svg:width="49.97488972540pt" svg:height="49.97488972540pt" svg:x="88.69621664820pt" svg:y="173.50896200180pt" text:anchor-type="paragraph"><draw:text-box><text:p text:style-name="P4">Hidalgo</text:p></draw:text-box><draw:glue-point draw:id="4" svg:x="0.50000000000pt" svg:y="0.50000000000pt" draw:align="center"/><draw:glue-point draw:id="5" svg:x="0.50000000000pt" svg:y="0.50000000000pt" draw:align="center"/></draw:frame><draw:frame draw:style-name="gr3" xml:id="shape-44" draw:id="shape-44" draw:name="Marco de texto 13" draw:z-index="48" svg:width="49.97488972540pt" svg:height="49.97488972540pt" svg:x="413.29205456400pt" svg:y="139.60654106500pt" text:anchor-type="paragraph"><draw:text-box><text:p text:style-name="P4">QRO</text:p></draw:text-box><draw:glue-point draw:id="4" svg:x="0.50000000000pt" svg:y="0.50000000000pt" draw:align="center"/><draw:glue-point draw:id="5" svg:x="0.50000000000pt" svg:y="0.50000000000pt" draw:align="center"/></draw:frame><draw:frame draw:style-name="gr3" xml:id="shape-45" draw:id="shape-45" draw:name="Marco de texto 14" draw:z-index="49" svg:width="49.97488972540pt" svg:height="49.97488972540pt" svg:x="490.67801539800pt" svg:y="175.15305933820pt" text:anchor-type="paragraph"><draw:text-box><text:p text:style-name="P4">SLP</text:p></draw:text-box><draw:glue-point draw:id="4" svg:x="0.50000000000pt" svg:y="0.50000000000pt" draw:align="center"/><draw:glue-point draw:id="5" svg:x="0.50000000000pt" svg:y="0.50000000000pt" draw:align="center"/></draw:frame><draw:frame draw:style-name="gr3" xml:id="shape-46" draw:id="shape-46" draw:name="Marco de texto 15" draw:z-index="50" svg:width="49.97488972540pt" svg:height="49.97488972540pt" svg:x="132.46322160340pt" svg:y="305.57533252400pt" text:anchor-type="paragraph"><draw:text-box><text:p text:style-name="P4">Morelos</text:p></draw:text-box><draw:glue-point draw:id="4" svg:x="0.50000000000pt" svg:y="0.50000000000pt" draw:align="center"/><draw:glue-point draw:id="5" svg:x="0.50000000000pt" svg:y="0.50000000000pt" draw:align="center"/></draw:frame><draw:frame draw:style-name="gr3" xml:id="shape-47" draw:id="shape-47" draw:name="Marco de texto 16" draw:z-index="51" svg:width="49.97488972540pt" svg:height="49.97488972540pt" svg:x="460.91418430800pt" svg:y="308.97691322000pt" text:anchor-type="paragraph"><draw:text-box><text:p text:style-name="P4">Zacatecas</text:p></draw:text-box><draw:glue-point draw:id="4" svg:x="0.50000000000pt" svg:y="0.50000000000pt" draw:align="center"/><draw:glue-point draw:id="5" svg:x="0.50000000000pt" svg:y="0.50000000000pt" draw:align="center"/></draw:frame><draw:frame draw:style-name="gr3" xml:id="shape-48" draw:id="shape-48" draw:name="Marco de texto 17" draw:z-index="52" svg:width="49.97488972540pt" svg:height="49.97488972540pt" svg:x="261.97840660360pt" svg:y="363.96913447200pt" text:anchor-type="paragraph"><draw:text-box><text:p text:style-name="P4">CDMX</text:p></draw:text-box><draw:glue-point draw:id="4" svg:x="0.50000000000pt" svg:y="0.50000000000pt" draw:align="center"/><draw:glue-point draw:id="5" svg:x="0.50000000000pt" svg:y="0.50000000000pt" draw:align="center"/></draw:frame><draw:frame draw:style-name="gr3" xml:id="shape-49" draw:id="shape-49" draw:name="Marco de texto 18" draw:z-index="53" svg:width="49.97488972540pt" svg:height="49.97488972540pt" svg:x="483.02445883200pt" svg:y="470.26853122200pt" text:anchor-type="paragraph"><draw:text-box><text:p text:style-name="P4">GDL</text:p></draw:text-box><draw:glue-point draw:id="4" svg:x="0.50000000000pt" svg:y="0.50000000000pt" draw:align="center"/><draw:glue-point draw:id="5" svg:x="0.50000000000pt" svg:y="0.50000000000pt" draw:align="center"/></draw:frame><draw:frame draw:style-name="gr3" xml:id="shape-50" draw:id="shape-50" draw:name="Marco de texto 19" draw:z-index="54" svg:width="69.95917631440pt" svg:height="49.97488972540pt" svg:x="319.74858542400pt" svg:y="527.24500788000pt" text:anchor-type="paragraph"><draw:text-box><text:p text:style-name="P4">Tamaulipas</text:p></draw:text-box><draw:glue-point draw:id="4" svg:x="0.50000000000pt" svg:y="0.50000000000pt" draw:align="center"/><draw:glue-point draw:id="5" svg:x="0.50000000000pt" svg:y="0.50000000000pt" draw:align="center"/></draw:frame><draw:frame draw:style-name="gr3" xml:id="shape-51" draw:id="shape-51" draw:name="Marco de texto 20" draw:z-index="55" svg:width="60.71821542360pt" svg:height="49.97488972540pt" svg:x="94.70567587780pt" svg:y="412.44165939000pt" text:anchor-type="paragraph"><draw:text-box><text:p text:style-name="P4">Monterrey</text:p></draw:text-box><draw:glue-point draw:id="4" svg:x="0.50000000000pt" svg:y="0.50000000000pt" draw:align="center"/><draw:glue-point draw:id="5" svg:x="0.50000000000pt" svg:y="0.50000000000pt" draw:align="center"/></draw:frame><draw:path draw:style-name="gr2" xml:id="shape-52" draw:id="shape-52" draw:name="Horizontal line 1" draw:z-index="56" svg:width="110.04113551560pt" svg:height="55.75757690860pt" svg:x="249.39255802840pt" svg:y="87.64739593360pt" svg:viewBox="0 0 110 56" text:anchor-type="paragraph" svg:d="M0 0L110.041 55.7576" calligra:nodeTypes="cc"><draw:glue-point draw:id="4" svg:x="0.50000000000pt" svg:y="0.50000000000pt" draw:align="center"/><draw:glue-point draw:id="5" svg:x="0.50000000000pt" svg:y="0.50000000000pt" draw:align="center"/></draw:path><draw:path draw:style-name="gr2" xml:id="shape-53" draw:id="shape-53" draw:name="Horizontal line 2" draw:z-index="57" svg:width="84.47258728400pt" svg:height="42.49141219420pt" svg:x="406.20542811400pt" svg:y="169.93730227100pt" svg:viewBox="0 0 84 42" text:anchor-type="paragraph" svg:d="M0 0L84.4726 42.4914" calligra:nodeTypes="cc"><draw:glue-point draw:id="4" svg:x="0.50000000000pt" svg:y="0.50000000000pt" draw:align="center"/><draw:glue-point draw:id="5" svg:x="0.50000000000pt" svg:y="0.50000000000pt" draw:align="center"/></draw:path><draw:path draw:style-name="gr2" xml:id="shape-54" draw:id="shape-54" draw:name="Horizontal line 3" draw:z-index="58" svg:width="16.72443842200pt" svg:height="76.73399120060pt" svg:x="493.22920092000pt" svg:y="254.63666160140pt" svg:viewBox="0 0 17 77" text:anchor-type="paragraph" svg:d="M0 76.734L16.7244 0" calligra:nodeTypes="cc"><draw:glue-point draw:id="4" svg:x="0.50000000000pt" svg:y="0.50000000000pt" draw:align="center"/><draw:glue-point draw:id="5" svg:x="0.50000000000pt" svg:y="0.50000000000pt" draw:align="center"/></draw:path><draw:path draw:style-name="gr2" xml:id="shape-55" draw:id="shape-55" draw:name="Horizontal line 4" draw:z-index="59" svg:width="20.69294923400pt" svg:height="70.01586932600pt" svg:x="464.59923006200pt" svg:y="381.54396806800pt" svg:viewBox="0 0 21 70" text:anchor-type="paragraph" svg:d="M0 70.0159L20.6929 0" calligra:nodeTypes="cc"><draw:glue-point draw:id="4" svg:x="0.50000000000pt" svg:y="0.50000000000pt" draw:align="center"/><draw:glue-point draw:id="5" svg:x="0.50000000000pt" svg:y="0.50000000000pt" draw:align="center"/></draw:path><draw:path draw:style-name="gr2" xml:id="shape-56" draw:id="shape-56" draw:name="Horizontal line 5" draw:z-index="60" svg:width="122.17343999800pt" svg:height="42.51975870000pt" svg:x="310.96116862600pt" svg:y="486.99296964400pt" svg:viewBox="0 0 122 43" text:anchor-type="paragraph" svg:d="M0 42.5198L122.173 0" calligra:nodeTypes="cc"><draw:glue-point draw:id="4" svg:x="0.50000000000pt" svg:y="0.50000000000pt" draw:align="center"/><draw:glue-point draw:id="5" svg:x="0.50000000000pt" svg:y="0.50000000000pt" draw:align="center"/></draw:path><draw:path draw:style-name="gr2" xml:id="shape-57" draw:id="shape-57" draw:name="Horizontal line 6" draw:z-index="61" svg:width="1.98425540600pt" svg:height="76.81903071800pt" svg:x="287.43356881200pt" svg:y="438.52044472600pt" svg:viewBox="0 0 2 77" text:anchor-type="paragraph" svg:d="M0 76.819L1.98426 0" calligra:nodeTypes="cc"><draw:glue-point draw:id="4" svg:x="0.50000000000pt" svg:y="0.50000000000pt" draw:align="center"/><draw:glue-point draw:id="5" svg:x="0.50000000000pt" svg:y="0.50000000000pt" draw:align="center"/></draw:path><draw:path draw:style-name="gr2" xml:id="shape-58" draw:id="shape-58" draw:name="Horizontal line 7" draw:z-index="62" svg:width="186.23654310600pt" svg:height="156.47271201600pt" svg:x="301.32335665400pt" svg:y="241.51222941600pt" svg:viewBox="0 0 186 156" text:anchor-type="paragraph" svg:d="M0 156.473L186.237 0" calligra:nodeTypes="cc"><draw:glue-point draw:id="4" svg:x="0.50000000000pt" svg:y="0.50000000000pt" draw:align="center"/><draw:glue-point draw:id="5" svg:x="0.50000000000pt" svg:y="0.50000000000pt" draw:align="center"/></draw:path><draw:path draw:style-name="gr2" xml:id="shape-59" draw:id="shape-59" draw:name="Horizontal line 8" draw:z-index="63" svg:width="85.03951740000pt" svg:height="205.03027645140pt" svg:x="291.40207962400pt" svg:y="183.60031806660pt" svg:viewBox="0 0 85 205" text:anchor-type="paragraph" svg:d="M0 205.03L85.0395 0" calligra:nodeTypes="cc"><draw:glue-point draw:id="4" svg:x="0.50000000000pt" svg:y="0.50000000000pt" draw:align="center"/><draw:glue-point draw:id="5" svg:x="0.50000000000pt" svg:y="0.50000000000pt" draw:align="center"/></draw:path><draw:path draw:style-name="gr2" xml:id="shape-60" draw:id="shape-60" draw:name="Horizontal line 9" draw:z-index="64" svg:width="37.81423873720pt" svg:height="283.32332547100pt" svg:x="231.08071528160pt" svg:y="105.30726904700pt" svg:viewBox="0 0 38 283" text:anchor-type="paragraph" svg:d="M37.8142 283.323L0 0" calligra:nodeTypes="cc"><draw:glue-point draw:id="4" svg:x="0.50000000000pt" svg:y="0.50000000000pt" draw:align="center"/><draw:glue-point draw:id="5" svg:x="0.50000000000pt" svg:y="0.50000000000pt" draw:align="center"/></draw:path><draw:path draw:style-name="gr2" xml:id="shape-61" draw:id="shape-61" draw:name="Horizontal line 10" draw:z-index="65" svg:width="60.68986891780pt" svg:height="99.12773078260pt" svg:x="71.74500617980pt" svg:y="223.45550522140pt" svg:viewBox="0 0 61 99" text:anchor-type="paragraph" svg:d="M60.6899 99.1277L0 0" calligra:nodeTypes="cc"><draw:glue-point draw:id="4" svg:x="0.50000000000pt" svg:y="0.50000000000pt" draw:align="center"/><draw:glue-point draw:id="5" svg:x="0.50000000000pt" svg:y="0.50000000000pt" draw:align="center"/></draw:path><draw:path draw:style-name="gr2" xml:id="shape-62" draw:id="shape-62" draw:name="Line 1" draw:z-index="66" svg:width="101.53718377560pt" svg:height="38.55124788800pt" svg:x="163.36091292540pt" svg:y="355.46518273200pt" svg:viewBox="0 0 102 39" text:anchor-type="paragraph" svg:d="M101.537 38.5512L0 0" calligra:nodeTypes="cc"><draw:glue-point draw:id="4" svg:x="0.50000000000pt" svg:y="0.50000000000pt" draw:align="center"/><draw:glue-point draw:id="5" svg:x="0.50000000000pt" svg:y="0.50000000000pt" draw:align="center"/></draw:path><draw:path draw:style-name="gr2" xml:id="shape-63" draw:id="shape-63" draw:name="Horizontal line 11" draw:z-index="67" svg:width="72.28358979000pt" svg:height="159.10893705540pt" svg:x="392.31564027200pt" svg:y="183.60031806660pt" svg:viewBox="0 0 72 159" text:anchor-type="paragraph" svg:d="M0 0L72.2836 159.109" calligra:nodeTypes="cc"><draw:glue-point draw:id="4" svg:x="0.50000000000pt" svg:y="0.50000000000pt" draw:align="center"/><draw:glue-point draw:id="5" svg:x="0.50000000000pt" svg:y="0.50000000000pt" draw:align="center"/></draw:path><draw:path draw:style-name="gr2" xml:id="shape-64" draw:id="shape-64" draw:name="Line 2" draw:z-index="68" svg:width="189.86489584840pt" svg:height="176.57038462820pt" svg:x="79.71037430960pt" svg:y="214.89486046980pt" svg:viewBox="0 0 190 177" text:anchor-type="paragraph" svg:d="M189.865 176.57L0 0" calligra:nodeTypes="cc"><draw:glue-point draw:id="4" svg:x="0.50000000000pt" svg:y="0.50000000000pt" draw:align="center"/><draw:glue-point draw:id="5" svg:x="0.50000000000pt" svg:y="0.50000000000pt" draw:align="center"/></draw:path><draw:path draw:style-name="gr2" xml:id="shape-65" draw:id="shape-65" draw:name="Horizontal line 12" draw:z-index="69" svg:width="157.89003730600pt" svg:height="54.99222125200pt" svg:x="303.02414700200pt" svg:y="358.86676342800pt" svg:viewBox="0 0 158 55" text:anchor-type="paragraph" svg:d="M0 54.9922L157.89 0" calligra:nodeTypes="cc"><draw:glue-point draw:id="4" svg:x="0.50000000000pt" svg:y="0.50000000000pt" draw:align="center"/><draw:glue-point draw:id="5" svg:x="0.50000000000pt" svg:y="0.50000000000pt" draw:align="center"/></draw:path><draw:frame draw:style-name="gr3" xml:id="shape-66" draw:id="shape-66" draw:name="Text Frame 1" draw:z-index="70" svg:width="49.86150370220pt" svg:height="27.67185896196pt" svg:x="299.33910124800pt" svg:y="94.25213178500pt" text:anchor-type="paragraph"><draw:text-box><text:p text:style-name="P4">394</text:p><text:p text:style-name="P4"/></draw:text-box><draw:glue-point draw:id="4" svg:x="0.50000000000pt" svg:y="0.50000000000pt" draw:align="center"/><draw:glue-point draw:id="5" svg:x="0.50000000000pt" svg:y="0.50000000000pt" draw:align="center"/></draw:frame><draw:frame draw:style-name="gr3" xml:id="shape-67" draw:id="shape-67" draw:name="Text Frame 2" draw:z-index="71" svg:width="41.15912642160pt" svg:height="19.87373521638pt" svg:x="442.77242059600pt" svg:y="169.93730227100pt" text:anchor-type="paragraph"><draw:text-box><text:p text:style-name="P4">296</text:p></draw:text-box><draw:glue-point draw:id="4" svg:x="0.50000000000pt" svg:y="0.50000000000pt" draw:align="center"/><draw:glue-point draw:id="5" svg:x="0.50000000000pt" svg:y="0.50000000000pt" draw:align="center"/></draw:frame><draw:frame draw:style-name="gr3" xml:id="shape-68" draw:id="shape-68" draw:name="Text Frame 3" draw:z-index="72" svg:width="35.85832983700pt" svg:height="23.92728554578pt" svg:x="513.07175498000pt" svg:y="283.43671149420pt" text:anchor-type="paragraph"><draw:text-box><text:p text:style-name="P4">346</text:p></draw:text-box><draw:glue-point draw:id="4" svg:x="0.50000000000pt" svg:y="0.50000000000pt" draw:align="center"/><draw:glue-point draw:id="5" svg:x="0.50000000000pt" svg:y="0.50000000000pt" draw:align="center"/></draw:frame><draw:frame draw:style-name="gr3" xml:id="shape-69" draw:id="shape-69" draw:name="Text Frame 4" draw:z-index="73" svg:width="45.80795337280pt" svg:height="29.22524747980pt" svg:x="490.67801539800pt" svg:y="404.50463776600pt" text:anchor-type="paragraph"><draw:text-box><text:p text:style-name="P4">491</text:p></draw:text-box><draw:glue-point draw:id="4" svg:x="0.50000000000pt" svg:y="0.50000000000pt" draw:align="center"/><draw:glue-point draw:id="5" svg:x="0.50000000000pt" svg:y="0.50000000000pt" draw:align="center"/></draw:frame><draw:frame draw:style-name="gr3" xml:id="shape-70" draw:id="shape-70" draw:name="Text Frame 5" draw:z-index="74" svg:width="42.51975870000pt" svg:height="26.56351058518pt" svg:x="390.61484992400pt" svg:y="511.37096463200pt" text:anchor-type="paragraph"><draw:text-box><text:p text:style-name="P4">125</text:p></draw:text-box><draw:glue-point draw:id="4" svg:x="0.50000000000pt" svg:y="0.50000000000pt" draw:align="center"/><draw:glue-point draw:id="5" svg:x="0.50000000000pt" svg:y="0.50000000000pt" draw:align="center"/></draw:frame><draw:frame draw:style-name="gr3" xml:id="shape-71" draw:id="shape-71" draw:name="Text Frame 6" draw:z-index="75" svg:width="40.53550329400pt" svg:height="21.91184898340pt" svg:x="295.93752055200pt" svg:y="457.79606867000pt" text:anchor-type="paragraph"><draw:text-box><text:p text:style-name="P4">513</text:p></draw:text-box><draw:glue-point draw:id="4" svg:x="0.50000000000pt" svg:y="0.50000000000pt" draw:align="center"/><draw:glue-point draw:id="5" svg:x="0.50000000000pt" svg:y="0.50000000000pt" draw:align="center"/></draw:frame><draw:frame draw:style-name="gr3" xml:id="shape-72" draw:id="shape-72" draw:name="Text Frame 7" draw:z-index="76" svg:width="40.53550329400pt" svg:height="17.26585668278pt" svg:x="380.97703795200pt" svg:y="386.07940899600pt" text:anchor-type="paragraph"><draw:text-box><text:p text:style-name="P4">355</text:p></draw:text-box><draw:glue-point draw:id="4" svg:x="0.50000000000pt" svg:y="0.50000000000pt" draw:align="center"/><draw:glue-point draw:id="5" svg:x="0.50000000000pt" svg:y="0.50000000000pt" draw:align="center"/></draw:frame><draw:frame draw:style-name="gr3" xml:id="shape-73" draw:id="shape-73" draw:name="Text Frame 8" draw:z-index="77" svg:width="47.82055528460pt" svg:height="19.98712123958pt" svg:x="352.63053215200pt" svg:y="322.86670106200pt" text:anchor-type="paragraph"><draw:text-box><text:p text:style-name="P4">603</text:p></draw:text-box><draw:glue-point draw:id="4" svg:x="0.50000000000pt" svg:y="0.50000000000pt" draw:align="center"/><draw:glue-point draw:id="5" svg:x="0.50000000000pt" svg:y="0.50000000000pt" draw:align="center"/></draw:frame><draw:frame draw:style-name="gr3" xml:id="shape-74" draw:id="shape-74" draw:name="Text Frame 9" draw:z-index="78" svg:width="45.80795337280pt" svg:height="28.57327784640pt" svg:x="326.55174681600pt" svg:y="227.93425313780pt" text:anchor-type="paragraph"><draw:text-box><text:p text:style-name="P4">313</text:p></draw:text-box><draw:glue-point draw:id="4" svg:x="0.50000000000pt" svg:y="0.50000000000pt" draw:align="center"/><draw:glue-point draw:id="5" svg:x="0.50000000000pt" svg:y="0.50000000000pt" draw:align="center"/></draw:frame><draw:frame draw:style-name="gr3" xml:id="shape-75" draw:id="shape-75" draw:name="Text Frame 10" draw:z-index="79" svg:width="41.81109605500pt" svg:height="24.26460896480pt" svg:x="422.92986653600pt" svg:y="241.51222941600pt" text:anchor-type="paragraph"><draw:text-box><text:p text:style-name="P4">309</text:p></draw:text-box><draw:glue-point draw:id="4" svg:x="0.50000000000pt" svg:y="0.50000000000pt" draw:align="center"/><draw:glue-point draw:id="5" svg:x="0.50000000000pt" svg:y="0.50000000000pt" draw:align="center"/></draw:frame><draw:path draw:style-name="gr2" xml:id="shape-76" draw:id="shape-76" draw:name="Horizontal line 13" draw:z-index="80" svg:width="123.47737926480pt" svg:height="20.40948417600pt" svg:x="133.71046785860pt" svg:y="419.81175089800pt" svg:viewBox="0 0 123 20" text:anchor-type="paragraph" svg:d="M0 20.4095L123.477 0" calligra:nodeTypes="cc"><draw:glue-point draw:id="4" svg:x="0.50000000000pt" svg:y="0.50000000000pt" draw:align="center"/><draw:glue-point draw:id="5" svg:x="0.50000000000pt" svg:y="0.50000000000pt" draw:align="center"/></draw:path><draw:frame draw:style-name="gr3" xml:id="shape-77" draw:id="shape-77" draw:name="Text Frame 11" draw:z-index="81" svg:width="46.45992300620pt" svg:height="26.56351058518pt" svg:x="217.75785755560pt" svg:y="162.19870618760pt" text:anchor-type="paragraph"><draw:text-box><text:p text:style-name="P4">437</text:p></draw:text-box><draw:glue-point draw:id="4" svg:x="0.50000000000pt" svg:y="0.50000000000pt" draw:align="center"/><draw:glue-point draw:id="5" svg:x="0.50000000000pt" svg:y="0.50000000000pt" draw:align="center"/></draw:frame><draw:frame draw:style-name="gr3" xml:id="shape-78" draw:id="shape-78" draw:name="Text Frame 12" draw:z-index="82" svg:width="49.12449455140pt" svg:height="26.56351058518pt" svg:x="135.43960471240pt" svg:y="244.26184047860pt" text:anchor-type="paragraph"><draw:text-box><text:p text:style-name="P4"><text:span text:style-name="T41">599</text:span></text:p></draw:text-box><draw:glue-point draw:id="4" svg:x="0.50000000000pt" svg:y="0.50000000000pt" draw:align="center"/><draw:glue-point draw:id="5" svg:x="0.50000000000pt" svg:y="0.50000000000pt" draw:align="center"/></draw:frame><draw:frame draw:style-name="gr3" xml:id="shape-79" draw:id="shape-79" draw:name="Text Frame 13" draw:z-index="83" svg:width="55.78592341440pt" svg:height="25.28791782418pt" svg:x="79.71037430960pt" svg:y="265.52171982860pt" text:anchor-type="paragraph"><draw:text-box><text:p text:style-name="P4">390</text:p></draw:text-box><draw:glue-point draw:id="4" svg:x="0.50000000000pt" svg:y="0.50000000000pt" draw:align="center"/><draw:glue-point draw:id="5" svg:x="0.50000000000pt" svg:y="0.50000000000pt" draw:align="center"/></draw:frame><draw:frame draw:style-name="gr3" xml:id="shape-80" draw:id="shape-80" draw:name="Text Frame 14" draw:z-index="84" svg:width="36.51029947040pt" svg:height="25.90587165062pt" svg:x="185.89638503640pt" svg:y="349.51241651400pt" text:anchor-type="paragraph"><draw:text-box><text:p text:style-name="P4">203</text:p></draw:text-box><draw:glue-point draw:id="4" svg:x="0.50000000000pt" svg:y="0.50000000000pt" draw:align="center"/><draw:glue-point draw:id="5" svg:x="0.50000000000pt" svg:y="0.50000000000pt" draw:align="center"/></draw:frame><draw:frame draw:style-name="gr3" xml:id="shape-81" draw:id="shape-81" draw:name="Text Frame 15" draw:z-index="85" svg:width="39.82684064900pt" svg:height="17.26585668278pt" svg:x="193.23813003860pt" svg:y="409.32354375200pt" text:anchor-type="paragraph"><draw:text-box><text:p text:style-name="P4">514</text:p></draw:text-box><draw:glue-point draw:id="4" svg:x="0.50000000000pt" svg:y="0.50000000000pt" draw:align="center"/><draw:glue-point draw:id="5" svg:x="0.50000000000pt" svg:y="0.50000000000pt" draw:align="center"/></draw:frame>Supongase que se desea ir de Tamaulipas a Hidalgo según el criterio es el de relizar el numero mínimo de transbordos si se quisiera viajar de Tamaulipas a Hidalgo, pero en esta ocasión por carretera el objetivo es el de minimizar las distancias recorridas</text:span></text:p>
      <text:p text:style-name="P6"><text:span text:style-name="T38">Supongamos que ahora se quiere ir de la ciudad de Tamaulipas a Hidalgo estas serian las posibles opciones:</text:span></text:p>
      <text:p text:style-name="P3"><text:span text:style-name="T38"/></text:p>
      <text:p text:style-name="P3"><text:span text:style-name="T38">TAMAULIPAS &gt; CDMX &gt; HIDALGO (1,112 km)</text:span></text:p>
      <text:p text:style-name="P3"><text:span text:style-name="T38">TAMAULIPAS &gt; CDMX &gt; MORELOS &gt; HIDALGO (1,106 km)</text:span></text:p>
      <text:p text:style-name="P3"><text:span text:style-name="T38"/></text:p>
      <text:p text:style-name="P3"><text:span text:style-name="T38">¿Cual es el mejor recorrido? Se ha definido un criterio que indica que tan bueno y eficiente es un recorrido. En este caso se ha seleccionado la suma total de kilómetros, que arroja el mejor recorrido, el cual nos permite llegar al destino cubriendo una menor distancia.</text:span></text:p>
      <text:p text:style-name="P3"><text:span text:style-name="T38">A simple vista los problemas que se han planteado , se puede intuir que hay 3 conceptos importantes que definen un problema. Por un lado se ha visto que se necesita crear un modelo simplificado que represente el problema real. Por ejemplo: reduciendo el enunciado del problema donde Eduardo y sus paletas a simples operaciones matemáticas.</text:span></text:p>
      <text:p text:style-name="P3"><text:span text:style-name="T38"/></text:p>
      <text:p text:style-name="P3"><text:span text:style-name="T38">También se ha llegado a la conclusión de que hay que tener muy claro el objetivo que se busca es decir ¿Cuando se da por resuelto el problema?, ¿Cuáles son las soluciones validas?</text:span></text:p>
      <text:p text:style-name="P3"><text:span text:style-name="T38">En los ejemplos del viaje de avión o por carretera ¿Cuales eran los objetivos? Por ejemplo encontrar las conexiones con el numero de trasbordo <text:s/>y el segundo, encontrar el recorrido con menor numero de km.</text:span></text:p>
      <text:p text:style-name="P3"><text:span text:style-name="T38"/></text:p>
      <text:p text:style-name="P3"><text:span text:style-name="T38"><draw:frame draw:style-name="gr4" xml:id="shape-82" draw:id="shape-82" draw:name="Shape 2" draw:z-index="87" svg:width="130.11046162200pt" svg:height="55.78592341440pt" svg:x="163.30421991380pt" svg:y="223.76731678520pt" text:anchor-type="paragraph"><draw:text-box><text:p text:style-name="P7">OBJETIVO</text:p></draw:text-box><draw:glue-point draw:id="4" svg:x="0.50000000000pt" svg:y="0.50000000000pt" draw:align="center"/><draw:glue-point draw:id="5" svg:x="0.50000000000pt" svg:y="0.50000000000pt" draw:align="center"/></draw:frame><draw:frame draw:style-name="gr4" xml:id="shape-83" draw:id="shape-83" draw:name="Shape 3" draw:z-index="88" svg:width="122.82540963140pt" svg:height="56.40954654200pt" svg:x="-9.21544903558pt" svg:y="225.75157219120pt" text:anchor-type="paragraph"><draw:text-box><text:p text:style-name="P7">MODELO</text:p></draw:text-box><draw:glue-point draw:id="4" svg:x="0.50000000000pt" svg:y="0.50000000000pt" draw:align="center"/><draw:glue-point draw:id="5" svg:x="0.50000000000pt" svg:y="0.50000000000pt" draw:align="center"/></draw:frame><draw:frame draw:style-name="gr4" xml:id="shape-84" draw:id="shape-84" draw:name="Shape 4" draw:z-index="89" svg:width="151.42703398360pt" svg:height="58.42214845380pt" svg:x="324.00056129400pt" svg:y="223.14369365760pt" text:anchor-type="paragraph"><draw:text-box><text:p text:style-name="P7">FUNCION DE EVALUACION</text:p></draw:text-box><draw:glue-point draw:id="4" svg:x="0.50000000000pt" svg:y="0.50000000000pt" draw:align="center"/><draw:glue-point draw:id="5" svg:x="0.50000000000pt" svg:y="0.50000000000pt" draw:align="center"/></draw:frame><draw:custom-shape draw:style-name="gr1" xml:id="shape-85" draw:id="shape-85" draw:name="Shape 5" draw:z-index="90" svg:x="210.64288459980pt" svg:y="169.39871866080pt" text:anchor-type="paragraph" svg:width="83.55479041843pt" svg:height="115.68261510509pt"><draw:enhanced-geometry svg:viewBox="0 0 21600 21600" draw:modifiers="50000 50000" draw:text-areas="?f0 0 ?f2 ?f5" draw:enhanced-path="M?f0 0 L?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glue-point draw:id="4" svg:x="0.50000000000pt" svg:y="0.50000000000pt" draw:align="center"/><draw:glue-point draw:id="5" svg:x="0.50000000000pt" svg:y="0.50000000000pt" draw:align="center"/></draw:custom-shape><draw:custom-shape draw:style-name="gr1" xml:id="shape-86" draw:id="shape-86" draw:name="Shape 6" draw:z-index="91" svg:x="53.34812391560pt" svg:y="162.14201317600pt" text:anchor-type="paragraph" svg:width="88.49338165114pt" svg:height="113.12355555370pt"><draw:enhanced-geometry svg:viewBox="0 0 21600 21600" draw:modifiers="50000 50000" draw:text-areas="?f0 0 ?f2 ?f5" draw:enhanced-path="M?f0 0 L?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glue-point draw:id="4" svg:x="0.50000000000pt" svg:y="0.50000000000pt" draw:align="center"/><draw:glue-point draw:id="5" svg:x="0.50000000000pt" svg:y="0.50000000000pt" draw:align="center"/></draw:custom-shape><draw:custom-shape draw:style-name="gr1" xml:id="shape-87" draw:id="shape-87" draw:name="Shape 7" draw:z-index="92" svg:x="346.11083581800pt" svg:y="167.64123530120pt" text:anchor-type="paragraph" svg:width="76.44527678967pt" svg:height="115.68261510509pt"><draw:enhanced-geometry svg:viewBox="0 0 21600 21600" draw:modifiers="50000 50000" draw:text-areas="?f0 0 ?f2 ?f5" draw:enhanced-path="M?f0 0 L?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glue-point draw:id="4" svg:x="0.50000000000pt" svg:y="0.50000000000pt" draw:align="center"/><draw:glue-point draw:id="5" svg:x="0.50000000000pt" svg:y="0.50000000000pt" draw:align="center"/></draw:custom-shape>Finalmente se ha tenido que definir un criterio que valore como buena cada una de las soluciones del problema para poder compararla con las demás y quedarse con la mejor solucion. En el caso de los viajes de avion, se ha tomado el criterio <text:s/>del numero de aereopuertos visitados. El problema de los viajes por carretera, el criterio la suma total de km. Este criterio da informacion de la calidad de la solucion a lo que a partir de ahora se le llamara<text:s text:c="2"/></text:span><text:span text:style-name="T39">Función de Evaluación</text:span></text:p>
      <text:p text:style-name="P3"><text:span text:style-name="T38"/></text:p>
      <text:p text:style-name="P3"><text:span text:style-name="T38"/></text:p>
      <text:p text:style-name="P3"><text:span text:style-name="T38"/></text:p>
      <text:p text:style-name="P3"><text:span text:style-name="T38"/></text:p>
      <text:p text:style-name="P3"><text:span text:style-name="T38"/></text:p>
      <text:p text:style-name="P3"><text:span text:style-name="T38"/></text:p>
      <text:p text:style-name="P3"><text:span text:style-name="T38"/></text:p>
      <text:p text:style-name="P3"><text:span text:style-name="T38"/></text:p>
      <text:p text:style-name="P3"><text:span text:style-name="T38"/></text:p>
      <text:p text:style-name="P3"><text:span text:style-name="T38"/></text:p>
      <text:p text:style-name="P3"><text:span text:style-name="T38"/></text:p>
      <text:p text:style-name="P3"><text:span text:style-name="T38"/></text:p>
      <text:p text:style-name="P3"><text:span text:style-name="T38"/></text:p>
      <text:p text:style-name="P3"><text:span text:style-name="T38"/></text:p>
      <text:p text:style-name="P3"><text:span text:style-name="T38"/></text:p>
      <text:p text:style-name="P3"><text:span text:style-name="T38"/></text:p>
      <text:p text:style-name="P2"><text:span text:style-name="T38">ALGUNOS TIPOS DE SOLUCIÓN</text:span></text:p>
      <text:p text:style-name="P3"><text:span text:style-name="T38"/></text:p>
      <text:p text:style-name="P3"><text:span text:style-name="T38">Antes de empezar a plantear solución a un problema, se ha visto en el apartado anterior, que necesario conceptual izarlo, eliminar información redundante y utilizar estructuras conocidas, como lo son las operaciones matemáticas para lograr moldearlo. El modelo es util para simplificación del modelo real.</text:span></text:p>
      <text:p text:style-name="P3"><text:span text:style-name="T38">Hay que tener muy claro que para construir el <text:s/>modelo se tiene que considerar conseguir la propia solución del problema real.</text:span></text:p>
      <text:p text:style-name="P3"><text:span text:style-name="T38"/></text:p>
      <text:p text:style-name="P3"><text:span text:style-name="T38">Cuando se conceptual-iza el problema, se necesita una forma de representar la información de la que se dispone, cuando finalmente se dispone, cuando finalmente se haga la implementación en el orden, este modelo tendrá que ser traducido a estructura de datos de operaciones que el ordenador sea capaz de manejar<text:s/></text:span></text:p>
      <text:p text:style-name="P3"><text:span text:style-name="T38"/></text:p>
      <text:p text:style-name="P2"><text:span text:style-name="T38">EL PROBLEMA DEL VIAJANTE DE COMERCIO<text:s/></text:span></text:p>
      <text:p text:style-name="P3"><text:span text:style-name="T38">El problema que se va a tratar es bastante conocido dentro de la IA y es conocido como “El problema del Viajante de Comercio” o también por sus siglas en ingles<text:s/></text:span><text:span text:style-name="T39">TSP (Travelling Salesman Problem).<text:s/></text:span><text:span text:style-name="T38">La formulación del problema es sencilla: sean N ciudades, todas conectadas por carretera entre si, cuya distancia entre ellas es conocida. El objetivo es encontrar una ruta que, empezando por la ciudad y acabando en la misma , pase exactamente una vez por cada una de las ciudades (Excepto por la primera, que será visitada 2 veces ) y minimiza la distancia recorrida.</text:span></text:p>
      <text:p text:style-name="P3"><text:span text:style-name="T38"/></text:p>
      <text:p text:style-name="P3"><text:span text:style-name="T38">Taras este simple enunciado se esconde un problema tremendamente divertido tanto que incluso los ordenadores más potentes que existen hoy en día no son capaces de resolverlo. Incluso para un numero de ciudades moderado. Aun así, se puede conseguir aproximaciones muy buenas utilizando diferentes técnicas de IA algunas de ellas serán estudiadas en los siguientes temas.</text:span></text:p>
      <text:p text:style-name="P3"><text:span text:style-name="T38"/></text:p>
      <text:p text:style-name="P3"><text:span text:style-name="T38"><draw:custom-shape draw:style-name="gr5" xml:id="shape-88" draw:id="shape-88" draw:name="Shape 9" draw:z-index="94" svg:x="-22.30586541402pt" svg:y="191.76411173700pt" text:anchor-type="paragraph" svg:width="49.97488972540pt" svg:height="49.97488972540pt"><text:p text:style-name="P7">A</text:p><draw:enhanced-geometry svg:viewBox="0 0 21600 21600" draw:modifiers="" draw:enhanced-path="U10800 10800 10800 10800 0 360 Z N"/><draw:glue-point draw:id="4" svg:x="0.50000000000pt" svg:y="0.50000000000pt" draw:align="center"/><draw:glue-point draw:id="5" svg:x="0.50000000000pt" svg:y="0.50000000000pt" draw:align="center"/></draw:custom-shape><draw:custom-shape draw:style-name="gr5" xml:id="shape-89" draw:id="shape-89" draw:name="Shape 10" draw:z-index="95" svg:x="174.84124777440pt" svg:y="191.76411173700pt" text:anchor-type="paragraph" svg:width="49.97488972540pt" svg:height="49.97488972540pt"><text:p text:style-name="P7">B</text:p><draw:enhanced-geometry svg:viewBox="0 0 21600 21600" draw:modifiers="" draw:enhanced-path="U10800 10800 10800 10800 0 360 Z N"/><draw:glue-point draw:id="4" svg:x="0.50000000000pt" svg:y="0.50000000000pt" draw:align="center"/><draw:glue-point draw:id="5" svg:x="0.50000000000pt" svg:y="0.50000000000pt" draw:align="center"/></draw:custom-shape><draw:custom-shape draw:style-name="gr5" xml:id="shape-90" draw:id="shape-90" draw:name="Shape 11" draw:z-index="96" svg:x="25.51185522000pt" svg:y="303.30761206000pt" text:anchor-type="paragraph" svg:width="49.97488972540pt" svg:height="49.97488972540pt"><text:p text:style-name="P7">E</text:p><draw:enhanced-geometry svg:viewBox="0 0 21600 21600" draw:modifiers="" draw:enhanced-path="U10800 10800 10800 10800 0 360 Z N"/><draw:glue-point draw:id="4" svg:x="0.50000000000pt" svg:y="0.50000000000pt" draw:align="center"/><draw:glue-point draw:id="5" svg:x="0.50000000000pt" svg:y="0.50000000000pt" draw:align="center"/></draw:custom-shape><draw:custom-shape draw:style-name="gr5" xml:id="shape-91" draw:id="shape-91" draw:name="Shape 12" draw:z-index="97" svg:x="125.03643708380pt" svg:y="306.42572769800pt" text:anchor-type="paragraph" svg:width="49.97488972540pt" svg:height="49.97488972540pt"><text:p text:style-name="P7">D</text:p><draw:enhanced-geometry svg:viewBox="0 0 21600 21600" draw:modifiers="" draw:enhanced-path="U10800 10800 10800 10800 0 360 Z N"/><draw:glue-point draw:id="4" svg:x="0.50000000000pt" svg:y="0.50000000000pt" draw:align="center"/><draw:glue-point draw:id="5" svg:x="0.50000000000pt" svg:y="0.50000000000pt" draw:align="center"/></draw:custom-shape><draw:custom-shape draw:style-name="gr5" xml:id="shape-92" draw:id="shape-92" draw:name="Shape 13" draw:z-index="98" svg:x="291.11861456600pt" svg:y="172.54518080460pt" text:anchor-type="paragraph" svg:width="49.97488972540pt" svg:height="53.91505403160pt"><text:p text:style-name="P7">A</text:p><draw:enhanced-geometry svg:viewBox="0 0 21600 21600" draw:modifiers="" draw:enhanced-path="U10800 10800 10800 10800 0 360 Z N"/><draw:glue-point draw:id="4" svg:x="0.50000000000pt" svg:y="0.50000000000pt" draw:align="center"/><draw:glue-point draw:id="5" svg:x="0.50000000000pt" svg:y="0.50000000000pt" draw:align="center"/></draw:custom-shape><draw:custom-shape draw:style-name="gr5" xml:id="shape-93" draw:id="shape-93" draw:name="Shape 14" draw:z-index="99" svg:x="404.50463776600pt" svg:y="117.41122702360pt" text:anchor-type="paragraph" svg:width="49.97488972540pt" svg:height="49.97488972540pt"><text:p text:style-name="P7">B</text:p><draw:enhanced-geometry svg:viewBox="0 0 21600 21600" draw:modifiers="" draw:enhanced-path="U10800 10800 10800 10800 0 360 Z N"/><draw:glue-point draw:id="4" svg:x="0.50000000000pt" svg:y="0.50000000000pt" draw:align="center"/><draw:glue-point draw:id="5" svg:x="0.50000000000pt" svg:y="0.50000000000pt" draw:align="center"/></draw:custom-shape><draw:custom-shape draw:style-name="gr5" xml:id="shape-94" draw:id="shape-94" draw:name="Shape 15" draw:z-index="100" svg:x="332.78797809200pt" svg:y="276.71858961960pt" text:anchor-type="paragraph" svg:width="49.97488972540pt" svg:height="49.97488972540pt"><text:p text:style-name="P7">E</text:p><draw:enhanced-geometry svg:viewBox="0 0 21600 21600" draw:modifiers="" draw:enhanced-path="U10800 10800 10800 10800 0 360 Z N"/><draw:glue-point draw:id="4" svg:x="0.50000000000pt" svg:y="0.50000000000pt" draw:align="center"/><draw:glue-point draw:id="5" svg:x="0.50000000000pt" svg:y="0.50000000000pt" draw:align="center"/></draw:custom-shape><draw:custom-shape draw:style-name="gr5" xml:id="shape-95" draw:id="shape-95" draw:name="Shape 16" draw:z-index="101" svg:x="452.97716268400pt" svg:y="325.13442152600pt" text:anchor-type="paragraph" svg:width="49.97488972540pt" svg:height="49.97488972540pt"><text:p text:style-name="P7">D</text:p><draw:enhanced-geometry svg:viewBox="0 0 21600 21600" draw:modifiers="" draw:enhanced-path="U10800 10800 10800 10800 0 360 Z N"/><draw:glue-point draw:id="4" svg:x="0.50000000000pt" svg:y="0.50000000000pt" draw:align="center"/><draw:glue-point draw:id="5" svg:x="0.50000000000pt" svg:y="0.50000000000pt" draw:align="center"/></draw:custom-shape><draw:custom-shape draw:style-name="gr5" xml:id="shape-96" draw:id="shape-96" draw:name="Shape 17" draw:z-index="102" svg:x="489.54415516600pt" svg:y="214.32793035380pt" text:anchor-type="paragraph" svg:width="49.97488972540pt" svg:height="49.97488972540pt"><text:p text:style-name="P7">C</text:p><draw:enhanced-geometry svg:viewBox="0 0 21600 21600" draw:modifiers="" draw:enhanced-path="U10800 10800 10800 10800 0 360 Z N"/><draw:glue-point draw:id="4" svg:x="0.50000000000pt" svg:y="0.50000000000pt" draw:align="center"/><draw:glue-point draw:id="5" svg:x="0.50000000000pt" svg:y="0.50000000000pt" draw:align="center"/></draw:custom-shape><draw:path draw:style-name="gr2" xml:id="shape-97" draw:id="shape-97" draw:name="Horizontal line 14" draw:z-index="103" svg:width="58.39096729742pt" svg:height="39.14652450980pt" svg:x="21.29106050638pt" svg:y="158.34358139880pt" svg:viewBox="0 0 58 39" text:anchor-type="paragraph" svg:d="M0 39.1465L58.391 0" calligra:nodeTypes="cc"><draw:glue-point draw:id="4" svg:x="0.50000000000pt" svg:y="0.50000000000pt" draw:align="center"/><draw:glue-point draw:id="5" svg:x="0.50000000000pt" svg:y="0.50000000000pt" draw:align="center"/></draw:path><draw:path draw:style-name="gr2" xml:id="shape-98" draw:id="shape-98" draw:name="Horizontal line 15" draw:z-index="104" svg:width="57.71348580880pt" svg:height="41.83944256080pt" svg:x="122.20178650380pt" svg:y="156.35932599280pt" svg:viewBox="0 0 58 42" text:anchor-type="paragraph" svg:d="M0 0L57.7135 41.8394" calligra:nodeTypes="cc"><draw:glue-point draw:id="4" svg:x="0.50000000000pt" svg:y="0.50000000000pt" draw:align="center"/><draw:glue-point draw:id="5" svg:x="0.50000000000pt" svg:y="0.50000000000pt" draw:align="center"/></draw:path><draw:path draw:style-name="gr2" xml:id="shape-99" draw:id="shape-99" draw:name="Horizontal line 16" draw:z-index="105" svg:width="110.86318418380pt" svg:height="79.68202780380pt" svg:x="67.74814886200pt" svg:y="230.71221070620pt" svg:viewBox="0 0 111 80" text:anchor-type="paragraph" svg:d="M0 79.682L110.863 0" calligra:nodeTypes="cc"><draw:glue-point draw:id="4" svg:x="0.50000000000pt" svg:y="0.50000000000pt" draw:align="center"/><draw:glue-point draw:id="5" svg:x="0.50000000000pt" svg:y="0.50000000000pt" draw:align="center"/></draw:path><draw:path draw:style-name="gr2" xml:id="shape-100" draw:id="shape-100" draw:name="Line 3" draw:z-index="106" svg:width="33.19375829180pt" svg:height="67.80484187360pt" svg:x="162.00028064700pt" svg:y="241.73900146240pt" svg:viewBox="0 0 33 68" text:anchor-type="paragraph" svg:d="M0 67.8048L33.1938 0" calligra:nodeTypes="cc"><draw:glue-point draw:id="4" svg:x="0.50000000000pt" svg:y="0.50000000000pt" draw:align="center"/><draw:glue-point draw:id="5" svg:x="0.50000000000pt" svg:y="0.50000000000pt" draw:align="center"/></draw:path><draw:path draw:style-name="gr2" xml:id="shape-101" draw:id="shape-101" draw:name="Horizontal line 17" draw:z-index="107" svg:width="49.94654321960pt" svg:height="1.13386023200pt" svg:x="75.45839843960pt" svg:y="334.77223349800pt" svg:viewBox="0 0 50 1" text:anchor-type="paragraph" svg:d="M0 0L49.9465 1.13386" calligra:nodeTypes="cc"><draw:glue-point draw:id="4" svg:x="0.50000000000pt" svg:y="0.50000000000pt" draw:align="center"/><draw:glue-point draw:id="5" svg:x="0.50000000000pt" svg:y="0.50000000000pt" draw:align="center"/></draw:path><draw:path draw:style-name="gr2" xml:id="shape-102" draw:id="shape-102" draw:name="Horizontal line 18" draw:z-index="108" svg:width="29.19633404388pt" svg:height="68.65523704760pt" svg:x="1.38954571432pt" svg:y="241.73900146240pt" svg:viewBox="0 0 29 69" text:anchor-type="paragraph" svg:d="M0 0L29.1963 68.6552" calligra:nodeTypes="cc"><draw:glue-point draw:id="4" svg:x="0.50000000000pt" svg:y="0.50000000000pt" draw:align="center"/><draw:glue-point draw:id="5" svg:x="0.50000000000pt" svg:y="0.50000000000pt" draw:align="center"/></draw:path><draw:path draw:style-name="gr2" xml:id="shape-103" draw:id="shape-103" draw:name="Horizontal line 19" draw:z-index="109" svg:width="109.50255190540pt" svg:height="86.23007064360pt" svg:x="19.30397044980pt" svg:y="232.66811960640pt" svg:viewBox="0 0 110 86" text:anchor-type="paragraph" svg:d="M0 0L109.503 86.2301" calligra:nodeTypes="cc"><draw:glue-point draw:id="4" svg:x="0.50000000000pt" svg:y="0.50000000000pt" draw:align="center"/><draw:glue-point draw:id="5" svg:x="0.50000000000pt" svg:y="0.50000000000pt" draw:align="center"/></draw:path><draw:path draw:style-name="gr2" xml:id="shape-104" draw:id="shape-104" draw:name="Horizontal line 20" draw:z-index="110" svg:width="38.49455487640pt" svg:height="133.96558641080pt" svg:x="52.49772874160pt" svg:y="169.34202564920pt" svg:viewBox="0 0 38 134" text:anchor-type="paragraph" svg:d="M0 133.966L38.4946 0" calligra:nodeTypes="cc"><draw:glue-point draw:id="4" svg:x="0.50000000000pt" svg:y="0.50000000000pt" draw:align="center"/><draw:glue-point draw:id="5" svg:x="0.50000000000pt" svg:y="0.50000000000pt" draw:align="center"/></draw:path><draw:path draw:style-name="gr2" xml:id="shape-105" draw:id="shape-105" draw:name="Horizontal line 21" draw:z-index="111" svg:width="147.19773531824pt" svg:height="2.04094841760pt" svg:x="27.64351245616pt" svg:y="214.10115830740pt" svg:viewBox="0 0 147 2" text:anchor-type="paragraph" svg:d="M0 2.04095L147.198 0" calligra:nodeTypes="cc"><draw:glue-point draw:id="4" svg:x="0.50000000000pt" svg:y="0.50000000000pt" draw:align="center"/><draw:glue-point draw:id="5" svg:x="0.50000000000pt" svg:y="0.50000000000pt" draw:align="center"/></draw:path><draw:path draw:style-name="gr2" xml:id="shape-106" draw:id="shape-106" draw:name="Horizontal line 22" draw:z-index="112" svg:width="36.51029947040pt" svg:height="137.08370204880pt" svg:x="107.60333601680pt" svg:y="169.34202564920pt" svg:viewBox="0 0 37 137" text:anchor-type="paragraph" svg:d="M0 0L36.5103 137.084" calligra:nodeTypes="cc"><draw:glue-point draw:id="4" svg:x="0.50000000000pt" svg:y="0.50000000000pt" draw:align="center"/><draw:glue-point draw:id="5" svg:x="0.50000000000pt" svg:y="0.50000000000pt" draw:align="center"/></draw:path><draw:frame draw:style-name="gr3" xml:id="shape-107" draw:id="shape-107" draw:name="Text Frame 16" draw:z-index="113" svg:width="29.22524747980pt" svg:height="21.26271400058pt" svg:x="145.38922824820pt" svg:y="163.64437798340pt" text:anchor-type="paragraph"><draw:text-box><text:p text:style-name="P4">13</text:p></draw:text-box><draw:glue-point draw:id="4" svg:x="0.50000000000pt" svg:y="0.50000000000pt" draw:align="center"/><draw:glue-point draw:id="5" svg:x="0.50000000000pt" svg:y="0.50000000000pt" draw:align="center"/></draw:frame><draw:frame draw:style-name="gr3" xml:id="shape-108" draw:id="shape-108" draw:name="Text Frame 17" draw:z-index="114" svg:width="31.20950288580pt" svg:height="22.62334627898pt" svg:x="178.61133304580pt" svg:y="271.16267448280pt" text:anchor-type="paragraph"><draw:text-box><text:p text:style-name="P4">15</text:p></draw:text-box><draw:glue-point draw:id="4" svg:x="0.50000000000pt" svg:y="0.50000000000pt" draw:align="center"/><draw:glue-point draw:id="5" svg:x="0.50000000000pt" svg:y="0.50000000000pt" draw:align="center"/></draw:frame><draw:frame draw:style-name="gr3" xml:id="shape-109" draw:id="shape-109" draw:name="Text Frame 18" draw:z-index="115" svg:width="43.82369796680pt" svg:height="29.93391012480pt" svg:x="86.34345666680pt" svg:y="334.77223349800pt" text:anchor-type="paragraph"><draw:text-box><text:p text:style-name="P4">32</text:p></draw:text-box><draw:glue-point draw:id="4" svg:x="0.50000000000pt" svg:y="0.50000000000pt" draw:align="center"/><draw:glue-point draw:id="5" svg:x="0.50000000000pt" svg:y="0.50000000000pt" draw:align="center"/></draw:frame><draw:frame draw:style-name="gr3" xml:id="shape-110" draw:id="shape-110" draw:name="Text Frame 19" draw:z-index="116" svg:width="22.56665326738pt" svg:height="21.26271400058pt" svg:x="11.98773730282pt" svg:y="261.86502058040pt" text:anchor-type="paragraph"><draw:text-box><text:p text:style-name="P4"><text:span text:style-name="T41">23</text:span></text:p></draw:text-box><draw:glue-point draw:id="4" svg:x="0.50000000000pt" svg:y="0.50000000000pt" draw:align="center"/><draw:glue-point draw:id="5" svg:x="0.50000000000pt" svg:y="0.50000000000pt" draw:align="center"/></draw:frame><draw:frame draw:style-name="gr3" xml:id="shape-111" draw:id="shape-111" draw:name="Text Frame 20" draw:z-index="117" svg:width="20.38397232078pt" svg:height="18.42522877000pt" svg:x="70.63949245360pt" svg:y="288.28396398600pt" text:anchor-type="paragraph"><draw:text-box><text:p text:style-name="P4"><text:span text:style-name="T41">45</text:span></text:p></draw:text-box><draw:glue-point draw:id="4" svg:x="0.50000000000pt" svg:y="0.50000000000pt" draw:align="center"/><draw:glue-point draw:id="5" svg:x="0.50000000000pt" svg:y="0.50000000000pt" draw:align="center"/></draw:frame><draw:frame draw:style-name="gr3" xml:id="shape-112" draw:id="shape-112" draw:name="Text Frame 21" draw:z-index="118" svg:width="19.93042822798pt" svg:height="20.57956321080pt" svg:x="32.59848167000pt" svg:y="163.64437798340pt" text:anchor-type="paragraph"><draw:text-box><text:p text:style-name="P4">52</text:p></draw:text-box><draw:glue-point draw:id="4" svg:x="0.50000000000pt" svg:y="0.50000000000pt" draw:align="center"/><draw:glue-point draw:id="5" svg:x="0.50000000000pt" svg:y="0.50000000000pt" draw:align="center"/></draw:frame><draw:frame draw:style-name="gr3" xml:id="shape-113" draw:id="shape-113" draw:name="Text Frame 22" draw:z-index="119" svg:width="21.91184898340pt" svg:height="18.62648896118pt" svg:x="90.99228361800pt" svg:y="195.53419700840pt" text:anchor-type="paragraph"><draw:text-box><text:p text:style-name="P4"><text:span text:style-name="T41">25</text:span></text:p></draw:text-box><draw:glue-point draw:id="4" svg:x="0.50000000000pt" svg:y="0.50000000000pt" draw:align="center"/><draw:glue-point draw:id="5" svg:x="0.50000000000pt" svg:y="0.50000000000pt" draw:align="center"/></draw:frame><draw:frame draw:style-name="gr3" xml:id="shape-114" draw:id="shape-114" draw:name="Text Frame 23" draw:z-index="120" svg:width="24.57642052860pt" svg:height="17.91499166560pt" svg:x="127.50258308840pt" svg:y="224.05078184320pt" text:anchor-type="paragraph"><draw:text-box><text:p text:style-name="P4"><text:span text:style-name="T41">15</text:span></text:p></draw:text-box><draw:glue-point draw:id="4" svg:x="0.50000000000pt" svg:y="0.50000000000pt" draw:align="center"/><draw:glue-point draw:id="5" svg:x="0.50000000000pt" svg:y="0.50000000000pt" draw:align="center"/></draw:frame><draw:frame draw:style-name="gr3" xml:id="shape-115" draw:id="shape-115" draw:name="Text Frame 24" draw:z-index="121" svg:width="29.87721711320pt" svg:height="18.17294486838pt" svg:x="107.60333601680pt" svg:y="292.25247479800pt" text:anchor-type="paragraph"><draw:text-box><text:p text:style-name="P4">65</text:p></draw:text-box><draw:glue-point draw:id="4" svg:x="0.50000000000pt" svg:y="0.50000000000pt" draw:align="center"/><draw:glue-point draw:id="5" svg:x="0.50000000000pt" svg:y="0.50000000000pt" draw:align="center"/></draw:frame><draw:frame draw:style-name="gr3" xml:id="shape-116" draw:id="shape-116" draw:name="Text Frame 25" draw:z-index="122" svg:width="18.62648896118pt" svg:height="16.61105239880pt" svg:x="72.39697581320pt" svg:y="232.66811960640pt" text:anchor-type="paragraph"><draw:text-box><text:p text:style-name="P4">27</text:p></draw:text-box><draw:glue-point draw:id="4" svg:x="0.50000000000pt" svg:y="0.50000000000pt" draw:align="center"/><draw:glue-point draw:id="5" svg:x="0.50000000000pt" svg:y="0.50000000000pt" draw:align="center"/></draw:frame><draw:frame draw:style-name="gr3" xml:id="shape-117" draw:id="shape-117" draw:name="Text Frame 26" draw:z-index="123" svg:width="27.86461520140pt" svg:height="17.26585668278pt" svg:x="343.27618523800pt" svg:y="135.41125820660pt" text:anchor-type="paragraph"><draw:text-box><text:p text:style-name="P4">25</text:p></draw:text-box><draw:glue-point draw:id="4" svg:x="0.50000000000pt" svg:y="0.50000000000pt" draw:align="center"/><draw:glue-point draw:id="5" svg:x="0.50000000000pt" svg:y="0.50000000000pt" draw:align="center"/></draw:frame><draw:frame draw:style-name="gr3" xml:id="shape-118" draw:id="shape-118" draw:name="Text Frame 27" draw:z-index="124" svg:width="22.62334627898pt" svg:height="15.96475206656pt" svg:x="489.26069010800pt" svg:y="166.59241458660pt" text:anchor-type="paragraph"><draw:text-box><text:p text:style-name="P4">13</text:p></draw:text-box><draw:glue-point draw:id="4" svg:x="0.50000000000pt" svg:y="0.50000000000pt" draw:align="center"/><draw:glue-point draw:id="5" svg:x="0.50000000000pt" svg:y="0.50000000000pt" draw:align="center"/></draw:frame><draw:frame draw:style-name="gr3" xml:id="shape-119" draw:id="shape-119" draw:name="Text Frame 28" draw:z-index="125" svg:width="23.92728554578pt" svg:height="20.60790971660pt" svg:x="512.50482486400pt" svg:y="282.78474186080pt" text:anchor-type="paragraph"><draw:text-box><text:p text:style-name="P4">15</text:p></draw:text-box><draw:glue-point draw:id="4" svg:x="0.50000000000pt" svg:y="0.50000000000pt" draw:align="center"/><draw:glue-point draw:id="5" svg:x="0.50000000000pt" svg:y="0.50000000000pt" draw:align="center"/></draw:frame><draw:frame draw:style-name="gr3" xml:id="shape-120" draw:id="shape-120" draw:name="Text Frame 29" draw:z-index="126" svg:width="29.28194049140pt" svg:height="21.96854199500pt" svg:x="378.42585243000pt" svg:y="349.22895145600pt" text:anchor-type="paragraph"><draw:text-box><text:p text:style-name="P4">32</text:p></draw:text-box><draw:glue-point draw:id="4" svg:x="0.50000000000pt" svg:y="0.50000000000pt" draw:align="center"/><draw:glue-point draw:id="5" svg:x="0.50000000000pt" svg:y="0.50000000000pt" draw:align="center"/></draw:frame><draw:frame draw:style-name="gr3" xml:id="shape-121" draw:id="shape-121" draw:name="Text Frame 30" draw:z-index="127" svg:width="26.56351058518pt" svg:height="21.26271400058pt" svg:x="282.18946523900pt" svg:y="242.27758507260pt" text:anchor-type="paragraph"><draw:text-box><text:p text:style-name="P4">23</text:p></draw:text-box><draw:glue-point draw:id="4" svg:x="0.50000000000pt" svg:y="0.50000000000pt" draw:align="center"/><draw:glue-point draw:id="5" svg:x="0.50000000000pt" svg:y="0.50000000000pt" draw:align="center"/></draw:frame><draw:frame draw:style-name="gr3" xml:id="shape-122" draw:id="shape-122" draw:name="Text Frame 31" draw:z-index="128" svg:width="22.56665326738pt" svg:height="17.91499166560pt" svg:x="405.63849799800pt" svg:y="187.20032430320pt" text:anchor-type="paragraph"><draw:text-box><text:p text:style-name="P4">45</text:p></draw:text-box><draw:glue-point draw:id="4" svg:x="0.50000000000pt" svg:y="0.50000000000pt" draw:align="center"/><draw:glue-point draw:id="5" svg:x="0.50000000000pt" svg:y="0.50000000000pt" draw:align="center"/></draw:frame><draw:frame draw:style-name="gr3" xml:id="shape-123" draw:id="shape-123" draw:name="Text Frame 32" draw:z-index="129" svg:width="19.93042822798pt" svg:height="17.26585668278pt" svg:x="439.37083990000pt" svg:y="230.28701311920pt" text:anchor-type="paragraph"><draw:text-box><text:p text:style-name="P4">52</text:p></draw:text-box><draw:glue-point draw:id="4" svg:x="0.50000000000pt" svg:y="0.50000000000pt" draw:align="center"/><draw:glue-point draw:id="5" svg:x="0.50000000000pt" svg:y="0.50000000000pt" draw:align="center"/></draw:frame>Comencemos por construir un modelo que el ordenador pueda manejar, empecemos por el mapa en si. Hay varias opciones: por ejemplo, se puede optar por representar las ciudades mediante un dígrafo ponderado. En este caso cada nodo del grafo representara una ciudad y cada arista corresponderá a una carretera con su distancia (peso) asociada. Debe tenerse en cuenta que para cada caso el TSP, la distancia a cubrir desde una ciudad A hasta B no tien porque ser la misma de B a A. De todas formas para simplificar el objetivo es necesario suponer que las distancias entre las ciudades son iguales independientemente en el sentido en el que se valla.</text:span></text:p>
      <text:p text:style-name="P8"><text:span text:style-name="T38">Otra posible representación es utilizar una tabla, también llamada matriz de adyacente como la siguiente.</text:span></text:p>
      <table:table table:style-name="Table1">
        <table:table-column table:style-name="Table1.A"/>
        <table:table-column table:style-name="Table1.A"/>
        <table:table-column table:style-name="Table1.A"/>
        <table:table-column table:style-name="Table1.A"/>
        <table:table-column table:style-name="Table1.A"/>
        <table:table-column table:style-name="Table1.A"/>
        <table:table-row table:style-name="Table1.1">
          <table:table-cell table:style-name="Table1.A1">
            <text:p text:style-name="P9"><text:span text:style-name="T38"/></text:p>
          </table:table-cell>
          <table:table-cell table:style-name="Table1.A1">
            <text:p text:style-name="P9"><text:span text:style-name="T38">A</text:span></text:p>
          </table:table-cell>
          <table:table-cell table:style-name="Table1.A1">
            <text:p text:style-name="P9"><text:span text:style-name="T38">B</text:span></text:p>
          </table:table-cell>
          <table:table-cell table:style-name="Table1.A1">
            <text:p text:style-name="P9"><text:span text:style-name="T38">C</text:span></text:p>
          </table:table-cell>
          <table:table-cell table:style-name="Table1.A1">
            <text:p text:style-name="P9"><text:span text:style-name="T38">D</text:span></text:p>
          </table:table-cell>
          <table:table-cell table:style-name="Table1.F1">
            <text:p text:style-name="P9"><text:span text:style-name="T38">E</text:span></text:p>
          </table:table-cell>
        </table:table-row>
        <table:table-row table:style-name="Table1.1">
          <table:table-cell table:style-name="Table1.A2">
            <text:p text:style-name="P9"><text:span text:style-name="T38">A</text:span></text:p>
          </table:table-cell>
          <table:table-cell table:style-name="Table1.A2">
            <text:p text:style-name="P9"><text:span text:style-name="T38">0</text:span></text:p>
          </table:table-cell>
          <table:table-cell table:style-name="Table1.A2">
            <text:p text:style-name="P9"><text:span text:style-name="T38">25</text:span></text:p>
          </table:table-cell>
          <table:table-cell table:style-name="Table1.A2">
            <text:p text:style-name="P9"><text:span text:style-name="T38">52</text:span></text:p>
          </table:table-cell>
          <table:table-cell table:style-name="Table1.A2">
            <text:p text:style-name="P9"><text:span text:style-name="T38">65</text:span></text:p>
          </table:table-cell>
          <table:table-cell table:style-name="Table1.F2">
            <text:p text:style-name="P9"><text:span text:style-name="T38">23</text:span></text:p>
          </table:table-cell>
        </table:table-row>
        <table:table-row table:style-name="Table1.1">
          <table:table-cell table:style-name="Table1.A2">
            <text:p text:style-name="P9"><text:span text:style-name="T38">B</text:span></text:p>
          </table:table-cell>
          <table:table-cell table:style-name="Table1.A2">
            <text:p text:style-name="P9"><text:span text:style-name="T38">25</text:span></text:p>
          </table:table-cell>
          <table:table-cell table:style-name="Table1.A2">
            <text:p text:style-name="P9"><text:span text:style-name="T38">0</text:span></text:p>
          </table:table-cell>
          <table:table-cell table:style-name="Table1.A2">
            <text:p text:style-name="P9"><text:span text:style-name="T38">13</text:span></text:p>
          </table:table-cell>
          <table:table-cell table:style-name="Table1.A2">
            <text:p text:style-name="P9"><text:span text:style-name="T38">15</text:span></text:p>
          </table:table-cell>
          <table:table-cell table:style-name="Table1.F2">
            <text:p text:style-name="P9"><text:span text:style-name="T38">45</text:span></text:p>
          </table:table-cell>
        </table:table-row>
        <table:table-row table:style-name="Table1.1">
          <table:table-cell table:style-name="Table1.A2">
            <text:p text:style-name="P9"><text:span text:style-name="T38">C</text:span></text:p>
          </table:table-cell>
          <table:table-cell table:style-name="Table1.A2">
            <text:p text:style-name="P9"><text:span text:style-name="T38">52</text:span></text:p>
          </table:table-cell>
          <table:table-cell table:style-name="Table1.A2">
            <text:p text:style-name="P9"><text:span text:style-name="T38">13</text:span></text:p>
          </table:table-cell>
          <table:table-cell table:style-name="Table1.A2">
            <text:p text:style-name="P9"><text:span text:style-name="T38">0</text:span></text:p>
          </table:table-cell>
          <table:table-cell table:style-name="Table1.A2">
            <text:p text:style-name="P9"><text:span text:style-name="T38">15</text:span></text:p>
          </table:table-cell>
          <table:table-cell table:style-name="Table1.F2">
            <text:p text:style-name="P9"><text:span text:style-name="T38">27</text:span></text:p>
          </table:table-cell>
        </table:table-row>
        <table:table-row table:style-name="Table1.1">
          <table:table-cell table:style-name="Table1.A2">
            <text:p text:style-name="P9"><text:span text:style-name="T38">D</text:span></text:p>
          </table:table-cell>
          <table:table-cell table:style-name="Table1.A2">
            <text:p text:style-name="P9"><text:span text:style-name="T38">65</text:span></text:p>
          </table:table-cell>
          <table:table-cell table:style-name="Table1.A2">
            <text:p text:style-name="P9"><text:span text:style-name="T38">15</text:span></text:p>
          </table:table-cell>
          <table:table-cell table:style-name="Table1.A2">
            <text:p text:style-name="P9"><text:span text:style-name="T38">15</text:span></text:p>
          </table:table-cell>
          <table:table-cell table:style-name="Table1.A2">
            <text:p text:style-name="P9"><text:span text:style-name="T38">0</text:span></text:p>
          </table:table-cell>
          <table:table-cell table:style-name="Table1.F2">
            <text:p text:style-name="P9"><text:span text:style-name="T38">32</text:span></text:p>
          </table:table-cell>
        </table:table-row>
        <table:table-row table:style-name="Table1.1">
          <table:table-cell table:style-name="Table1.A2">
            <text:p text:style-name="P9"><text:span text:style-name="T38">E</text:span></text:p>
          </table:table-cell>
          <table:table-cell table:style-name="Table1.A2">
            <text:p text:style-name="P9"><text:span text:style-name="T38">23</text:span></text:p>
          </table:table-cell>
          <table:table-cell table:style-name="Table1.A2">
            <text:p text:style-name="P9"><text:span text:style-name="T38">45</text:span></text:p>
          </table:table-cell>
          <table:table-cell table:style-name="Table1.A2">
            <text:p text:style-name="P9"><text:span text:style-name="T38">27</text:span></text:p>
          </table:table-cell>
          <table:table-cell table:style-name="Table1.A2">
            <text:p text:style-name="P9"><text:span text:style-name="T38">32</text:span></text:p>
          </table:table-cell>
          <table:table-cell table:style-name="Table1.F2">
            <text:p text:style-name="P9"><text:span text:style-name="T38">0</text:span></text:p>
          </table:table-cell>
        </table:table-row>
      </table:table>
      <text:p text:style-name="P3"><text:span text:style-name="T38"/></text:p>
      <text:p text:style-name="P3"><text:span text:style-name="T38">Siempre que sea posible se elegirá el la representación más simple <text:s/>e intuitiva, a no ser que en términos de eficiencia sea más congruente utilizar otra estructura de datos mas compleja en caso de que se presenta parece que la tabla es mas interesante ya que puede ser modelada fácilmente con un arreglo de dos dimensiones. La implementación de grafo no aporta nada ya que se trata de una estructura de datos estática que no cambia durante su ejecución. Si la información fuera cambiante durante el tiempo de ejecución, por ejemplo, que se asignen nuevas ciudades entonces si seria interesante usar un grafo como una estructura dinámica.<text:s/></text:span></text:p>
      <text:p text:style-name="P3"><text:span text:style-name="T38"/></text:p>
      <text:p text:style-name="P3"><text:span text:style-name="T38">Una vez modelada la información del problema es necesario una forma de representar la solución, es decir, que el objetivo, pueda ser representado de una forma simple y directa que cumpla con las siguientes premisas:</text:span></text:p>
      <text:p text:style-name="P3"><text:span text:style-name="T38">- La lista comienza y termina por la misma ciudades</text:span></text:p>
      <text:p text:style-name="P3"><text:span text:style-name="T38">- En la lista aparecen todas las ciudades.</text:span></text:p>
      <text:p text:style-name="P3"><text:span text:style-name="T38">- No se repite ninguna ciudad, excepto la primera y la ultima.</text:span></text:p>
      <text:p text:style-name="P3"><text:span text:style-name="T38"/></text:p>
      <text:p text:style-name="P3"><text:span text:style-name="T38">Cualquier lista de ciudades que cumpla las tres premisas anteriores es una posible solución.</text:span></text:p>
      <text:p text:style-name="P3"><text:span text:style-name="T38">Sin embargo se sabe que no todas las soluciones son iguales, de echo se busca la ruta con menor distancia. Se necesita una función de evaluación que informe la calidad de solucion para poder compararla con otras soluciones. Para el TSP se usara la suma de as distancias de cada una de las ciudades por laas que va pasando. Por ejemplo, estas son posibles soluciones y el valor obtenido por la solucion.</text:span></text:p>
      <text:p text:style-name="P3"><text:span text:style-name="T38"/></text:p>
      <text:p text:style-name="P3"><text:span text:style-name="T38">A – B – E – D – C - A (Función de evaluación: 169)</text:span></text:p>
      <text:p text:style-name="P3"><text:span text:style-name="T38">A – E – D – C – B - A (Función de evaluación:108)</text:span></text:p>
      <text:p text:style-name="P3"><text:span text:style-name="T38">A – C – D – E – B – A (Función de evaluación: 169)</text:span></text:p>
      <text:p text:style-name="P3"><text:span text:style-name="T38"/></text:p>
      <text:p text:style-name="P3"><text:span text:style-name="T38">¿Como encontrar la mejor solución? En teoría se podría proceder de la siguiente manera:</text:span></text:p>
      <text:p text:style-name="P3"><text:span text:style-name="T38">- generar todas las posibles soluciones</text:span></text:p>
      <text:p text:style-name="P3"><text:span text:style-name="T38">- Comparar una con otra y quedarse siempre con la que arroje mejor valor</text:span></text:p>
      <text:p text:style-name="P3"><text:span text:style-name="T38"/></text:p>
      <text:p text:style-name="P3"><text:span text:style-name="T38">Analicemos con detalle el primer paso. ¿Como se genera todas las soluciones?, ¿Cuantas soluciones hay?</text:span></text:p>
      <text:p text:style-name="P3"><text:span text:style-name="T38"/></text:p>
      <text:p text:style-name="P3"><text:span text:style-name="T38">Otra forma de generar todas las posibles soluciones es a partir de una lista de ciudades cualquiera e ir permutandolas entre ellas. Cada permutación serpa una posible solución al problema. Suponga se que la lista de las ciudades es la siguiente:</text:span></text:p>
      <text:p text:style-name="P3"><text:span text:style-name="T38">A – B - E – C - D – A (Función de evaluación: 177)</text:span></text:p>
      <text:p text:style-name="P3"><text:span text:style-name="T38">Si se hace cambio entre las ciudades B y E se obtendrá:</text:span></text:p>
      <text:p text:style-name="P3"><text:span text:style-name="T38">A – E – B – D – C – A (Función de evaluación: 150)</text:span></text:p>
      <text:p text:style-name="P3"><text:span text:style-name="T38"/></text:p>
      <text:p text:style-name="P3"><text:span text:style-name="T38">Si se efectúa un cambio de E y D sobre la primera ruta se obtiene:</text:span></text:p>
      <text:p text:style-name="P3"><text:span text:style-name="T38">A – D – E – B – C – A (Función de evaluación: 207)</text:span></text:p>
      <text:p text:style-name="P3"><text:span text:style-name="T38"/></text:p>
      <text:p text:style-name="P3"><text:span text:style-name="T38">Y así hasta obtener varias combinaciones posibles pero ¿Cuantas hay? Si se tiene N ciudades, se tiene N! De combinaciones posibles N! = nx(x1) xn(x2)x...x1</text:span></text:p>
      <text:p text:style-name="P3"><text:span text:style-name="T38"/></text:p>
      <text:p text:style-name="P3"><text:span text:style-name="T38">5! = 5 *4 * 3 * 2 * 1=120</text:span></text:p>
      <text:p text:style-name="P3"><text:span text:style-name="T38"/></text:p>
      <text:p text:style-name="P3"><text:span text:style-name="T38">Con 7 ciudades se tendrían 5,040 posibles soluciones.</text:span></text:p>
      <text:p text:style-name="P3"><text:span text:style-name="T38">Con 10 ciudades se tendrían 3,628,800 posibles soluciones.</text:span></text:p>
      <text:p text:style-name="P3"><text:span text:style-name="T38">Con 20 ciudades se tendrían <text:s/>2,432,902,008,172,640,000 posibles soluciones.</text:span></text:p>
      <text:p text:style-name="P3"><text:span text:style-name="T38"/></text:p>
      <text:p text:style-name="P3"><text:span text:style-name="T38">Para tener una idea, si cada permutación, se le ocupara al ordenador un micro segundo con 20 ciudades se necesaria 77147 años para generar todo el espacio de estados</text:span></text:p>
      <text:p text:style-name="P3"><text:span text:style-name="T38"/></text:p>
      <text:p text:style-name="P3"><text:span text:style-name="T38">A este tipo de problemas se le llamará intratables, y se dice que pertenecen a la clase<text:s/></text:span><text:span text:style-name="T39">NP,<text:s/></text:span></text:p>
      <text:p text:style-name="P3"><text:span text:style-name="T38">que sin entrar en detalles, se dirá que son una clase de problemas cuya complejidad hace que no tenga solución en un tiempo razonable por el ordenador.</text:span></text:p>
      <text:p text:style-name="P3"><text:span text:style-name="T38"/></text:p>
      <text:p text:style-name="P3"><text:span text:style-name="T38">Por lo tanto, queda claro que métodos computacionales clásicos no es posible resolver este problema, precisamente la IA trata de como abordar este tipo de problemas a través de diferentes técnicas que serán tratadas en sucesivos temas. Quizá no se pueda crear un código que asegure el mejor resultado, pero si ofrecer un resultado que sea optima o al menos muy buena en un tiempo razonable</text:span></text:p>
      <text:p text:style-name="P3"><text:span text:style-name="T38"/></text:p>
      <text:p text:style-name="P2"><text:span text:style-name="T38">El problema de Satisfactibilidad Booleana</text:span></text:p>
      <text:p text:style-name="P3"><text:span text:style-name="T38"><text:s/></text:span></text:p>
      <text:p text:style-name="P3"><text:span text:style-name="T38">Tras este largo y estrombótico nombre, se encuentra otro problema clásico, el nombre de la satis factibilidad booleana o para abreviar<text:s/></text:span><text:span text:style-name="T39">SAT (BOOLEAN Satisfactibility Problem)<text:s/></text:span><text:span text:style-name="T38">tiene le honor de ser el primer problema conocido de la clase<text:s/></text:span><text:span text:style-name="T39">NP,<text:s/></text:span><text:span text:style-name="T38">así, fue solo 4 décadas en 1971 cuando se demostró que SAT era un problema intratable.</text:span></text:p>
      <text:p text:style-name="P3"><text:span text:style-name="T38"/></text:p>
      <text:p text:style-name="P3"><text:span text:style-name="T38">Antes de describir el problema se deben recordar conceptos básicos de lógica booleana.</text:span></text:p>
      <text:p text:style-name="P3"><text:span text:style-name="T38">Una variable booleana es aquella que puede tomar dos valores diferentes: Verdadero y Falso. También se puede representar como 1 y 0 o como V y F.<text:s/></text:span></text:p>
      <text:p text:style-name="P3"><text:span text:style-name="T38"/></text:p>
      <text:p text:style-name="P3"><text:span text:style-name="T38">Sobre estas variables se puede realizar varias operaciones pero nos centraremos en las tres principales: Conjunción, Disyunción y Negación.</text:span></text:p>
      <text:p text:style-name="P3"><text:span text:style-name="T38"/></text:p>
      <text:p text:style-name="P3"><text:span text:style-name="T38">La Conjunción también conocida como operación AND y representada por el símbolo ^, es una operación binaria en el sentido de que e operan con dos variables y que devueve el valor verdadero solo cuando ambos valores son verdaderos. La siguiente tabla muestra el resultado de operar con la operación conjuntiva (AND).</text:span></text:p>
      <text:p text:style-name="P10"><text:span text:style-name="T38"/></text:p>
      <table:table table:style-name="Table2">
        <table:table-column table:style-name="Table2.A"/>
        <table:table-column table:style-name="Table2.B"/>
        <table:table-column table:style-name="Table2.A"/>
        <table:table-row table:style-name="Table1.1">
          <table:table-cell table:style-name="Table1.A1">
            <text:p text:style-name="P9"><text:span text:style-name="T38">OP</text:span></text:p>
          </table:table-cell>
          <table:table-cell table:style-name="Table1.A1">
            <text:p text:style-name="P9"><text:span text:style-name="T38">AND</text:span></text:p>
          </table:table-cell>
          <table:table-cell table:style-name="Table1.F1">
            <text:p text:style-name="P9"><text:span text:style-name="T38">AP</text:span></text:p>
          </table:table-cell>
        </table:table-row>
        <table:table-row table:style-name="Table1.1">
          <table:table-cell table:style-name="Table1.A2">
            <text:p text:style-name="P9"><text:span text:style-name="T38">F</text:span></text:p>
          </table:table-cell>
          <table:table-cell table:style-name="Table1.A2">
            <text:p text:style-name="P9"><text:span text:style-name="T38">F</text:span></text:p>
          </table:table-cell>
          <table:table-cell table:style-name="Table1.F2">
            <text:p text:style-name="P9"><text:span text:style-name="T38">F</text:span></text:p>
          </table:table-cell>
        </table:table-row>
        <table:table-row table:style-name="Table1.1">
          <table:table-cell table:style-name="Table1.A2">
            <text:p text:style-name="P9"><text:span text:style-name="T38">F</text:span></text:p>
          </table:table-cell>
          <table:table-cell table:style-name="Table1.A2">
            <text:p text:style-name="P9"><text:span text:style-name="T38">F</text:span></text:p>
          </table:table-cell>
          <table:table-cell table:style-name="Table1.F2">
            <text:p text:style-name="P9"><text:span text:style-name="T38">V</text:span></text:p>
          </table:table-cell>
        </table:table-row>
        <table:table-row table:style-name="Table1.1">
          <table:table-cell table:style-name="Table1.A2">
            <text:p text:style-name="P9"><text:span text:style-name="T38">V</text:span></text:p>
          </table:table-cell>
          <table:table-cell table:style-name="Table1.A2">
            <text:p text:style-name="P9"><text:span text:style-name="T38">F</text:span></text:p>
          </table:table-cell>
          <table:table-cell table:style-name="Table1.F2">
            <text:p text:style-name="P9"><text:span text:style-name="T38">F</text:span></text:p>
          </table:table-cell>
        </table:table-row>
        <table:table-row table:style-name="Table1.1">
          <table:table-cell table:style-name="Table1.A2">
            <text:p text:style-name="P9"><text:span text:style-name="T38">V</text:span></text:p>
          </table:table-cell>
          <table:table-cell table:style-name="Table1.A2">
            <text:p text:style-name="P9"><text:span text:style-name="T38">V</text:span></text:p>
          </table:table-cell>
          <table:table-cell table:style-name="Table1.F2">
            <text:p text:style-name="P9"><text:span text:style-name="T38">V</text:span></text:p>
          </table:table-cell>
        </table:table-row>
      </table:table>
      <text:p text:style-name="P3"><text:span text:style-name="T38"/></text:p>
      <text:p text:style-name="P3"><text:span text:style-name="T38"/></text:p>
      <text:p text:style-name="P3"><text:span text:style-name="T38">La disyunción, su operador OR se representa con el símbolo y devuelve el valor verdadero, si el signo de los operadores es verdadero, según la tabla siguiente:</text:span></text:p>
      <table:table table:style-name="Table2">
        <table:table-column table:style-name="Table2.A"/>
        <table:table-column table:style-name="Table2.B"/>
        <table:table-column table:style-name="Table2.A"/>
        <table:table-row table:style-name="Table1.1">
          <table:table-cell table:style-name="Table1.A1">
            <text:p text:style-name="P9"><text:span text:style-name="T38">OP</text:span></text:p>
          </table:table-cell>
          <table:table-cell table:style-name="Table1.A1">
            <text:p text:style-name="P9"><text:span text:style-name="T38">AND</text:span></text:p>
          </table:table-cell>
          <table:table-cell table:style-name="Table1.F1">
            <text:p text:style-name="P9"><text:span text:style-name="T38">AP</text:span></text:p>
          </table:table-cell>
        </table:table-row>
        <table:table-row table:style-name="Table1.1">
          <table:table-cell table:style-name="Table1.A2">
            <text:p text:style-name="P9"><text:span text:style-name="T38">F</text:span></text:p>
          </table:table-cell>
          <table:table-cell table:style-name="Table1.A2">
            <text:p text:style-name="P9"><text:span text:style-name="T38">F</text:span></text:p>
          </table:table-cell>
          <table:table-cell table:style-name="Table1.F2">
            <text:p text:style-name="P9"><text:span text:style-name="T38">F</text:span></text:p>
          </table:table-cell>
        </table:table-row>
        <table:table-row table:style-name="Table1.1">
          <table:table-cell table:style-name="Table1.A2">
            <text:p text:style-name="P9"><text:span text:style-name="T38">F</text:span></text:p>
          </table:table-cell>
          <table:table-cell table:style-name="Table1.A2">
            <text:p text:style-name="P9"><text:span text:style-name="T38">V</text:span></text:p>
          </table:table-cell>
          <table:table-cell table:style-name="Table1.F2">
            <text:p text:style-name="P9"><text:span text:style-name="T38">V</text:span></text:p>
          </table:table-cell>
        </table:table-row>
        <table:table-row table:style-name="Table1.1">
          <table:table-cell table:style-name="Table1.A2">
            <text:p text:style-name="P9"><text:span text:style-name="T38">V</text:span></text:p>
          </table:table-cell>
          <table:table-cell table:style-name="Table1.A2">
            <text:p text:style-name="P9"><text:span text:style-name="T38">V</text:span></text:p>
          </table:table-cell>
          <table:table-cell table:style-name="Table1.F2">
            <text:p text:style-name="P9"><text:span text:style-name="T38">F</text:span></text:p>
          </table:table-cell>
        </table:table-row>
        <table:table-row table:style-name="Table1.1">
          <table:table-cell table:style-name="Table1.A2">
            <text:p text:style-name="P9"><text:span text:style-name="T38">V</text:span></text:p>
          </table:table-cell>
          <table:table-cell table:style-name="Table1.A2">
            <text:p text:style-name="P9"><text:span text:style-name="T38">V</text:span></text:p>
          </table:table-cell>
          <table:table-cell table:style-name="Table1.F2">
            <text:p text:style-name="P9"><text:span text:style-name="T38">V</text:span></text:p>
          </table:table-cell>
        </table:table-row>
      </table:table>
      <text:p text:style-name="P3"><text:span text:style-name="T38"/></text:p>
      <text:p text:style-name="P3"><text:span text:style-name="T38">Por ultimo el operador unario opera sobre una sola variable, de negación, operador NOT, se representa con el símbolo ¬</text:span></text:p>
      <table:table table:style-name="Table3">
        <table:table-column table:style-name="Table3.A"/>
        <table:table-column table:style-name="Table3.B"/>
        <table:table-row table:style-name="Table1.1">
          <table:table-cell table:style-name="Table1.A1">
            <text:p text:style-name="P9"><text:span text:style-name="T38">OP</text:span></text:p>
          </table:table-cell>
          <table:table-cell table:style-name="Table1.F1">
            <text:p text:style-name="P9"><text:span text:style-name="T38">¬OP</text:span></text:p>
          </table:table-cell>
        </table:table-row>
        <table:table-row table:style-name="Table1.1">
          <table:table-cell table:style-name="Table1.A2">
            <text:p text:style-name="P9"><text:span text:style-name="T38">F</text:span></text:p>
          </table:table-cell>
          <table:table-cell table:style-name="Table1.F2">
            <text:p text:style-name="P9"><text:span text:style-name="T38">V</text:span></text:p>
          </table:table-cell>
        </table:table-row>
        <table:table-row table:style-name="Table1.1">
          <table:table-cell table:style-name="Table1.A2">
            <text:p text:style-name="P9"><text:span text:style-name="T38">V</text:span></text:p>
          </table:table-cell>
          <table:table-cell table:style-name="Table1.F2">
            <text:p text:style-name="P9"><text:span text:style-name="T38">F</text:span></text:p>
          </table:table-cell>
        </table:table-row>
      </table:table>
      <text:p text:style-name="P3"><text:span text:style-name="T38"/></text:p>
      <text:p text:style-name="P3"><text:span text:style-name="T38">Es posible construir funciones booleanas, cuyo resultado depende de sus variables por ejemplo:<text:s/></text:span></text:p>
      <text:p text:style-name="P3"><text:span text:style-name="T38"/></text:p>
      <text:p text:style-name="P3"><text:span text:style-name="T38">Si se presenta el valor verdadero como V y Falso como F, las siguientes asignaciones de variables darían como resultado los siguientes valores<text:s/></text:span></text:p>
      <text:p text:style-name="P3"><text:span text:style-name="T38"/></text:p>
      <text:p text:style-name="P3"><text:span text:style-name="T42">ʃ</text:span><text:span text:style-name="T38">(</text:span><text:span text:style-name="T43">F,V,V) =<text:s/></text:span><text:span text:style-name="T44">(</text:span><text:span text:style-name="T43">VF</text:span><text:span text:style-name="T44">)¬ V = F</text:span></text:p>
      <text:p text:style-name="P3"><text:span text:style-name="T45">ʃ</text:span><text:span text:style-name="T44">(</text:span><text:span text:style-name="T43">F,V,V) =<text:s/></text:span><text:span text:style-name="T44">(</text:span><text:span text:style-name="T43">VF</text:span><text:span text:style-name="T44">)¬ V = V</text:span></text:p>
      <text:p text:style-name="P3"><text:span text:style-name="T38"/></text:p>
      <text:p text:style-name="P3"><text:span text:style-name="T44">Las funciones booleanas suelen expresar se de forma normalizada para que sea mas fácil operar con ellas. Las dos formas habituales son:<text:s/></text:span><text:span text:style-name="T46">Forma Normal Conjuntiva (NFC)<text:s/></text:span><text:span text:style-name="T44">y la<text:s/></text:span><text:span text:style-name="T46">Forma Normal Disyuntiva (FND).<text:s/></text:span><text:span text:style-name="T44">La NFC se expresa como agrupaciones de disyunciones llamadas clausulas unidad por conjunciones de la siguiente manera:<text:s/></text:span></text:p>
      <text:p text:style-name="P3"><text:span text:style-name="T38"/></text:p>
      <text:p text:style-name="P11"><text:span text:style-name="T38">(x2 x4)(x3 x1)(x2¬x1)</text:span></text:p>
      <text:p text:style-name="P3"><text:span text:style-name="T38"/></text:p>
      <text:p text:style-name="P11"><text:span text:style-name="T38">En cambio, la función FND tiene el siguiente aspecto:</text:span></text:p>
      <text:p text:style-name="P3"><text:span text:style-name="T38"/></text:p>
      <text:p text:style-name="P11"><text:span text:style-name="T38">(x2 x4)(x3 x1)(x2¬x1)</text:span></text:p>
      <text:p text:style-name="P3"><text:span text:style-name="T38"/></text:p>
      <text:p text:style-name="P11"><text:span text:style-name="T38">Ambas formas son igualmente validad, pero en este caso se usará preferentemente la NFC.</text:span></text:p>
      <text:p text:style-name="P3"><text:span text:style-name="T44">Una clausula puede tener un numero cualquiera de variable, y a su vez una función booleana en NFC o FND pueden tener varias clausulas como sea necesario.</text:span></text:p>
      <text:p text:style-name="P3"><text:span text:style-name="T38"/></text:p>
      <text:p text:style-name="P11"><text:span text:style-name="T38">Finalizando este breve recordatorio de lógica booleana en el FNC con n variables, se quiere saber si existe una asignación para las variables sin tener que pensar demasiado.</text:span></text:p>
      <text:p text:style-name="P3"><text:span text:style-name="T38"/></text:p>
      <text:p text:style-name="P3"><text:span text:style-name="T44">Por ejemplo la asignación x1 ¿f, x2 = V, x3 = V, x4 <text:s/>= F, satisface la restricciones del problema?</text:span></text:p>
      <text:p text:style-name="P3"><text:span text:style-name="T38"/></text:p>
      <text:p text:style-name="P3"><text:span text:style-name="T44">Si ahora se quisiera resolver el problema con una función de tres variables (Problema conocido 3 SAT) y 100 variables booleanas. La cosa se complica un poco. Vamos a plantear un modelo, un objetivo y una función de evaluación.</text:span></text:p>
      <text:p text:style-name="P3"><text:span text:style-name="T38"/></text:p>
      <text:p text:style-name="P3"><text:span text:style-name="T44">En este caso el modelo es bastante directo. Se pueden representar asignaciones de las variables como cadenas de valores 0 y 1. por ejemplo x1 = f, x2 = V, x3 = V, x4 = F, estaría representado por una cadena 0110. si se tiene 100 variables, se tendría una cadena de 100 dígitos binarios.</text:span></text:p>
      <text:p text:style-name="P3"><text:span text:style-name="T38"/></text:p>
      <text:p text:style-name="P11"><text:span text:style-name="T38">Una cadena cualquiera de n dígitos binarios es una candidata a ser una solución y, por lo tanto, tendríamos que ir evaluándolas como una función de evaluación. Para 100 variables, nuestro espacio de estados (número de posibles soluciones) es de 2100, es un decir, un numero astronómica mente alto. De nuevo nos encontramos con un problema intratable de la clase NP.</text:span></text:p>
      <text:p text:style-name="P3"><text:span text:style-name="T38"/></text:p>
      <text:p text:style-name="P11"><text:span text:style-name="T38">Ademas, encontrar una función de evaluación que permita comparar diferentes soluciones tampoco es fácil. Si se evalúa la función, nos devolverá un valor verdadero o falso, pero si no se tiene información de cuantas variables son correctas y cuantas no (Si lo supiéramos , significa entonces que conocemos la solución) Si comparamos dos cadenas diferentes que devuelven el valor falso, ¿como sabemos cual de las dos es la mejor?</text:span></text:p>
      <text:p text:style-name="P3"><text:span text:style-name="T38"/></text:p>
      <text:p text:style-name="P11"><text:span text:style-name="T38">Al ser una función NFC, se sabe que la evaluación de todas las cláusulas ha de arrojar un valor verdadero. Si hay uno que no lo es, la función no puede ser verdadera. Por lo tanto, una función de evaluación que nos daría una medida de la calidad de una asignación es aquella que devuelve el numero de clausulas que son verdaderas.</text:span></text:p>
      <text:p text:style-name="P2"><text:span text:style-name="T38"/></text:p>
      <text:p text:style-name="P12"><text:span text:style-name="T38">El problema de la programación Lineal Entera</text:span></text:p>
      <text:p text:style-name="P12"><text:span text:style-name="T38"/></text:p>
      <text:p text:style-name="P11"><text:span text:style-name="T38">El problema de la programación lineal entera</text:span><text:span text:style-name="T39"><text:s text:c="2"/>(PLE)<text:s text:c="2"/></text:span><text:span text:style-name="T38">consiste en la optimización de una función en la que intervienen variables enteras y ademas hay algunas restricciones impuestas, por ejemplo, sea la función:</text:span></text:p>
      <text:p text:style-name="P3"><text:span text:style-name="T38"/></text:p>
      <text:p text:style-name="P3"><text:span text:style-name="T45">ʃ</text:span><text:span text:style-name="T43">x1, x2 = 21x1 + 11x2</text:span></text:p>
      <text:p text:style-name="P3"><text:span text:style-name="T38"/></text:p>
      <text:p text:style-name="P11"><text:span text:style-name="T38">Donde x1 y x2 son dos variables enteras y sean también las siguientes restricciones:<text:s/></text:span></text:p>
      <text:p text:style-name="P13"><text:span text:style-name="T38"/></text:p>
      <text:p text:style-name="P13"><text:span text:style-name="T38">7x1 + 4x2<text:s/></text:span><text:span text:style-name="T42">≤ 13</text:span></text:p>
      <text:p text:style-name="P13"><text:span text:style-name="T42">x1<text:s/></text:span>≥ 0</text:p>
      <text:p text:style-name="P13">x2 ≥ 0</text:p>
      <text:p text:style-name="P11"><text:span text:style-name="T47">Es decir, se busca una asignación de valores para las dos variables, que maximice o minimice el valor de la función f que a su vez cumpla con las restricciones impuestas de ser mayores o iguales que cero y que la suma de 7x1 y 4x2 sea menor que 13.</text:span></text:p>
      <text:p text:style-name="P11"><text:span text:style-name="T47"/></text:p>
      <text:p text:style-name="P11"><text:span text:style-name="T47">Para hacerse una idea de la utilidad que tiene este tipo de problemas se plantea un ejemplo mas elaborado<text:s/></text:span></text:p>
      <text:p text:style-name="P11"><text:span text:style-name="T47"/></text:p>
      <text:p text:style-name="P11"><text:span text:style-name="T47">Una empresa fabrica dos tipos de prendas de vestir; camisetas y pantalones. El tiempo necesario para fabricar un pantalón es de 3h y se necesita 4m de tela. En el caso de las camisetas se necesitan 2h y son necesario 3m de tela. También se sabe que la tela disponible para una semana es de 160m y con los empleados que hay contratados se puede invertir 150h a la semana de trabajo, el dueño de la empresa nos ha pedido que a partir del costo de producción y el precio de venta de las prendas se estime cuantas camisetas y cuantos pantalones se tienen que fabricar para obtener el máximo de ganancias.</text:span></text:p>
      <text:p text:style-name="P11"><text:span text:style-name="T47"/></text:p>
      <text:p text:style-name="P11"><text:span text:style-name="T47">En la siguiente tabla de datos se muestre un resumen:</text:span></text:p>
      <text:p text:style-name="P11"><text:span text:style-name="T47"/></text:p>
      <table:table table:style-name="Table4">
        <table:table-column table:style-name="Table4.A"/>
        <table:table-column table:style-name="Table4.B"/>
        <table:table-column table:style-name="Table4.C"/>
        <table:table-row table:style-name="Table1.1">
          <table:table-cell table:style-name="Table1.A1">
            <text:p text:style-name="P9"><text:span text:style-name="T47"/></text:p>
          </table:table-cell>
          <table:table-cell table:style-name="Table1.A1">
            <text:p text:style-name="P9"><text:span text:style-name="T47">Pantalón</text:span></text:p>
          </table:table-cell>
          <table:table-cell table:style-name="Table1.F1">
            <text:p text:style-name="P9"><text:span text:style-name="T47">Camiseta</text:span></text:p>
          </table:table-cell>
        </table:table-row>
        <table:table-row table:style-name="Table1.1">
          <table:table-cell table:style-name="Table1.A2">
            <text:p text:style-name="P9"><text:span text:style-name="T47">Horas de Producción por prenda</text:span></text:p>
          </table:table-cell>
          <table:table-cell table:style-name="Table1.A2">
            <text:p text:style-name="P9"><text:span text:style-name="T47">3</text:span></text:p>
          </table:table-cell>
          <table:table-cell table:style-name="Table1.F2">
            <text:p text:style-name="P9"><text:span text:style-name="T47">2</text:span></text:p>
          </table:table-cell>
        </table:table-row>
        <table:table-row table:style-name="Table1.1">
          <table:table-cell table:style-name="Table1.A2">
            <text:p text:style-name="P9"><text:span text:style-name="T47">Metros por prenda</text:span></text:p>
          </table:table-cell>
          <table:table-cell table:style-name="Table1.A2">
            <text:p text:style-name="P9"><text:span text:style-name="T47">4</text:span></text:p>
          </table:table-cell>
          <table:table-cell table:style-name="Table1.F2">
            <text:p text:style-name="P9"><text:span text:style-name="T47">3</text:span></text:p>
          </table:table-cell>
        </table:table-row>
        <table:table-row table:style-name="Table1.1">
          <table:table-cell table:style-name="Table1.A2">
            <text:p text:style-name="P9"><text:span text:style-name="T47">Costo de producción</text:span></text:p>
          </table:table-cell>
          <table:table-cell table:style-name="Table1.A2">
            <text:p text:style-name="P9"><text:span text:style-name="T47">6</text:span></text:p>
          </table:table-cell>
          <table:table-cell table:style-name="Table1.F2">
            <text:p text:style-name="P9"><text:span text:style-name="T47">4</text:span></text:p>
          </table:table-cell>
        </table:table-row>
      </table:table>
      <text:p text:style-name="P14"/>
      <table:table table:style-name="Table4">
        <table:table-column table:style-name="Table4.A1"/>
        <table:table-column table:style-name="Table4.B1"/>
        <table:table-column table:style-name="Table4.C"/>
        <table:table-row table:style-name="Table1.1">
          <table:table-cell table:style-name="Table1.A1">
            <text:p text:style-name="P9"><text:span text:style-name="T47">Precio Venta</text:span></text:p>
          </table:table-cell>
          <table:table-cell table:style-name="Table1.A1">
            <text:p text:style-name="P9"><text:span text:style-name="T47">12</text:span></text:p>
          </table:table-cell>
          <table:table-cell table:style-name="Table1.F1">
            <text:p text:style-name="P9"><text:span text:style-name="T47">8</text:span></text:p>
          </table:table-cell>
        </table:table-row>
      </table:table>
      <text:p text:style-name="P11"><text:span text:style-name="T47"/></text:p>
      <text:p text:style-name="P11"><text:span text:style-name="T47">Se busca representar el problema, para ello es necesario utilizar dos variables. Las llamaremos x1 al número de pantalones y x2 al número de camisetas. Lo que se busca es el máximo beneficio de los recursos con los que se dispone, así que se definirá el beneficio según la siguiente formula.</text:span></text:p>
      <text:p text:style-name="P11"><text:span text:style-name="T47"/></text:p>
      <text:p text:style-name="P11"><text:span text:style-name="T47">Beneficio = (precio de venta – costo de producción) * unidades vendidas</text:span></text:p>
      <text:p text:style-name="P11"><text:span text:style-name="T47"/></text:p>
      <text:p text:style-name="P11"><text:span text:style-name="T47">Como el beneficio total sera la suma de los beneficios de ambas prendas se llega la siguiente ecuación que representa la función de un beneficio para este caso en concreto quedaría de la siguiente manera:</text:span></text:p>
      <text:p text:style-name="P3"><text:span text:style-name="T42">ʃ(</text:span><text:span text:style-name="T43">x1, x2) = (12 – 6)x1 + (8 - 4)x2</text:span></text:p>
      <text:p text:style-name="P11"><text:span text:style-name="T47"/></text:p>
      <text:p text:style-name="P11"><text:span text:style-name="T47">Por otro lado hay que poner una serie de restricciones. La primera y la mas obvia es que ambas variables han de ser mayores o iguales a 0. <text:s/>No se puede fabricar un numero negativo de prendas.</text:span></text:p>
      <text:p text:style-name="P13"><text:span text:style-name="T42">x1<text:s/></text:span>≥ 0</text:p>
      <text:p text:style-name="P13">x2 ≥ 0</text:p>
      <text:p text:style-name="P11"><text:span text:style-name="T47">Tambien se sabe que se dispone de una capacidad de trabajo semanal de 150 h, como fabricar un panatalon se invierte 3 horas y dos horas de una camiseta, se ha de imponer la siguiente restriccion al problemas<text:s/></text:span></text:p>
      <text:p text:style-name="P11"><text:span text:style-name="T47">3x1 + 2x<text:s/></text:span><text:span text:style-name="T48">≤ 150</text:span></text:p>
      <text:p text:style-name="P11"><text:span text:style-name="T47"/></text:p>
      <text:p text:style-name="P11"><text:span text:style-name="T47">Lo mismo sucede con la cantidad de metros de tela disponibles semanalmente, que son de 160 m, como un pantalón necesita 4 metros de teka y una camiseta 3, se impondra la siguiente restriccion:</text:span></text:p>
      <text:p text:style-name="P11"><text:span text:style-name="T42">4x1 + 3x2<text:s/></text:span><text:span text:style-name="T48">≤ 160</text:span></text:p>
      <text:p text:style-name="P11"><text:span text:style-name="T47">En resume, el problema de PLE</text:span></text:p>
      <text:p text:style-name="P11"><text:span text:style-name="T47"/></text:p>
      <text:p text:style-name="P3"><text:span text:style-name="T48">ʃ(x1, x2) = (12 – 6)x1 + (8 – 4)x2</text:span></text:p>
      <text:p text:style-name="P11"><text:span text:style-name="T47">Restricciones:</text:span></text:p>
      <text:p text:style-name="P11"><text:span text:style-name="T47"/></text:p>
      <text:p text:style-name="P11"><text:span text:style-name="T47">3x1 + 2x2<text:s/></text:span><text:span text:style-name="T49">≤ 150</text:span></text:p>
      <text:p text:style-name="P11"><text:span text:style-name="T49">4x1 + 3x2 ≤ 160</text:span></text:p>
      <text:p text:style-name="P11"><text:span text:style-name="T49">x1 ≥ 0</text:span></text:p>
      <text:p text:style-name="P11"><text:span text:style-name="T49">x2 ≥0</text:span></text:p>
      <text:p text:style-name="P11"><text:span text:style-name="T47"/></text:p>
      <text:p text:style-name="P11"><text:span text:style-name="T47">El objetivo es encontrar una asignación de valores enteros para las variables x1 y x2 que, cumpliendo con las restricciones impuestas, hagan que la función<text:s/></text:span><text:span text:style-name="T50">f<text:s/></text:span><text:span text:style-name="T47">tome el máximo posible.</text:span></text:p>
      <text:p text:style-name="P11"><text:span text:style-name="T47"/></text:p>
      <text:p text:style-name="P11"><text:span text:style-name="T47">se puede comprobar que la variable x1, este acotada entre 0 y 50, mientras que x2 lo esta entre 0 y 75. por lo tanto el espacio de estados constara de 50 *75 =3750 posibilidades, que no es un numero muy elevado. Es perfectamente tratable por un ordenador. Sin embargo,en este problema solo entran <text:s/>en juego dos variables y rango de valores posibles es muy limitado. Puede demostrarse que para mayor numero de variables y rango de valores del problema es intratable.</text:span></text:p>
      <text:p text:style-name="P11"><text:span text:style-name="T47"/></text:p>
      <text:p text:style-name="P11"><text:span text:style-name="T47">La función de evaluación del problema es muy evidente. Se puede usar la misma función que maximice y pueda comparar las diferentes asignaciones de variables. a mayor valor de la función, mejor sera la calidad de las funciones de las variables.</text:span></text:p>
      <text:p text:style-name="P11"><text:span text:style-name="T47"/></text:p>
      <text:p text:style-name="P11"><text:span text:style-name="T47">Un problema relacionado<text:s text:c="2"/></text:span><text:span text:style-name="T50">PLE<text:s/></text:span><text:span text:style-name="T47">es de la programación no lineal<text:s/></text:span><text:span text:style-name="T50">(PNL)</text:span><text:span text:style-name="T47"><text:s/>en que la función o alguna de las restricciones es una función no lineal y las variables toman valores reales.</text:span></text:p>
      <text:p text:style-name="P11"><text:span text:style-name="T47"/></text:p>
      <text:p text:style-name="P12"><text:span text:style-name="T47">Otros Problemas</text:span></text:p>
      <text:p text:style-name="P11"><text:span text:style-name="T47"/></text:p>
      <text:p text:style-name="P11"><text:span text:style-name="T47">Los problemas propuestos hasta ahora no han sido escogidos al azar. Son problemas bien conocidos y estudiados, ya que son problemas canónicos; es decir, cada uno de estos problemas representan y se resuelven de la misma manera que una multitud de otros problemas diferentes. En definitiva, son un modelo que permite atacar la resolución de otros similares. Por ejemplo el TSP es la base de un problema con mucha mayor aplicación práctica: el problema de las rutas de vehículos o Vehicle Routing problema (VRP). Las distribuidoras de mercancías o las empresas de reparto tratan siempre de optimizar las rutas de reparto, ya que esto trae un gran beneficio económico por el ahorro en recursos: tiempo, combustible, vehículos y personal. El problema consiste en, dado un numero arbitrario de clientes a los que hay que servir mercancía, calcular las rutas que minimicen el número de vehículos necesarios y el número de kilómetros recorridos por cada vehículo. Al resolver el problema de la ruta de vehículos hay que tener en cuenta que las rutas pueden tener asociadas restricciones como:</text:span></text:p>
      <text:p text:style-name="P11"><text:span text:style-name="T47"/></text:p>
      <text:p text:style-name="P11"><text:span text:style-name="T47">-<text:tab/>Carga máxima de los vehículos: dependiendo de la cantidad, peso, volumen de los pedidos de cada cliente, un vehículo podrá atender a más o menos clientes en un viaje.</text:span></text:p>
      <text:p text:style-name="P11"><text:span text:style-name="T47">-<text:tab/>Horario de los clientes: las rutas tienen que diseñarse de acuerdo con los horarios de los clientes. De nada sirve que la ruta sea optima si el transportista, que suele cobrar por horas, tiene que esperar una hora a que habrá el comercio del cliente para poder entregar la mercancía.</text:span></text:p>
      <text:p text:style-name="P11"><text:span text:style-name="T47">-<text:tab/>Horario del transportista: Los transportistas pueden limitarse a solo la distancia recorrida o el tiempo de trabajo que pueden realizar sin descansar.</text:span></text:p>
      <text:p text:style-name="P11"><text:span text:style-name="T47">-<text:tab/>Preferencia: algunos clientes pueden ser más importantes que otros y por lo tanto es posible que se interese entregarles antes de los demás.</text:span></text:p>
      <text:p text:style-name="P11"><text:span text:style-name="T47">-<text:tab/>Número de almacenes: hay que tener en cuenta que almacenes surten a cada cliente en concreto.</text:span></text:p>
      <text:p text:style-name="P11"><text:span text:style-name="T47">-<text:tab/>Recarga: Otra condicionante es si los vehículos cargan la mercancía una vez o pueden volver al almacén a volver a cargar más mercancía.</text:span></text:p>
      <text:p text:style-name="P11"><text:span text:style-name="T47"/></text:p>
      <text:p text:style-name="P11"><text:span text:style-name="T47">Evidentemente, si se puede presidir de un vehículo, la empresa se ahorra un transportista y a menor número de kilómetros, mayor ahorro de combustible.</text:span></text:p>
      <text:p text:style-name="P11"><text:span text:style-name="T47"/></text:p>
      <text:p text:style-name="P11"><text:span text:style-name="T47"/></text:p>
      <text:p text:style-name="P11"><text:span text:style-name="T47">A lo largo de este curso se presentaran técnicas que permitan liderar con la complejidad implícita de estos problemas y resolverlos, o al menos conseguir aproximaciones lo suficientemente buenas para ser aceptadas.</text:span></text:p>
      <text:p text:style-name="P11"><text:span text:style-name="T47"/></text:p>
      <text:p text:style-name="P11"><text:span text:style-name="T47">Pero la IA trata de resolver muchos mas problemas y de distinta índole, estos son algunas técnicas de IA con resultado comprometedor.</text:span></text:p>
      <text:p text:style-name="P11"><text:span text:style-name="T47"/></text:p>
      <text:p text:style-name="P11"><text:span text:style-name="T47">- Minería de Datos</text:span></text:p>
      <text:p text:style-name="P11"><text:span text:style-name="T47">- Reconocimiento del Habla</text:span></text:p>
      <text:p text:style-name="P11"><text:span text:style-name="T47">- Reconocimiento de escritura</text:span></text:p>
      <text:p text:style-name="P11"><text:span text:style-name="T47">- Visión Artificial</text:span></text:p>
      <text:p text:style-name="P11"><text:span text:style-name="T47">- Diagnostico Medico</text:span></text:p>
      <text:p text:style-name="P11"><text:span text:style-name="T47">- Robótica</text:span></text:p>
      <text:p text:style-name="P11"><text:span text:style-name="T47">- Entornos industriales</text:span></text:p>
      <text:p text:style-name="P11"><text:span text:style-name="T47">- Planificación y control</text:span></text:p>
      <text:p text:style-name="P11"><text:span text:style-name="T47">- Videojuegos</text:span></text:p>
      <text:p text:style-name="P11"><text:span text:style-name="T47">- Seguridad (Rust)</text:span></text:p>
      <text:p text:style-name="P11"><text:span text:style-name="T47">- Predicciones Financieras</text:span></text:p>
      <text:p text:style-name="P11"><text:span text:style-name="T47">- Predicciones de Catástrofes</text:span></text:p>
      <text:p text:style-name="P11"><text:span text:style-name="T47">- Marketing especializado</text:span></text:p>
      <text:p text:style-name="P11"><text:span text:style-name="T47"/></text:p>
      <text:p text:style-name="P11"><text:span text:style-name="T47"/></text:p>
      <text:p text:style-name="P11"><text:span text:style-name="T47"/></text:p>
      <text:p text:style-name="P11"><text:span text:style-name="T47"/></text:p>
      <text:p text:style-name="P11"><text:span text:style-name="T47"/></text:p>
      <text:p text:style-name="P12"><text:span text:style-name="T47">BÚSQUEDA NO INFORMADA</text:span></text:p>
      <text:p text:style-name="P11"><text:span text:style-name="T47"/></text:p>
      <text:p text:style-name="P11"><text:span text:style-name="T47">Las técnicas que se presentan a continuación son conocidas de forma genérica como<text:s/></text:span><text:span text:style-name="T50">búsqueda,<text:s/></text:span><text:span text:style-name="T47">ya que pretenden encontrar una solución valida dentro de estados.</text:span></text:p>
      <text:p text:style-name="P11"><text:span text:style-name="T47"/></text:p>
      <text:p text:style-name="P11"><text:span text:style-name="T47">En concreto, las que se analizaran en este tema se denomina técnicas de<text:s/></text:span><text:span text:style-name="T50">búsqueda no informada<text:s/></text:span><text:span text:style-name="T47">debido a que el problema que se quiere resolver no ofrece ninguna información adicional que ayude a encontrar una solución mas rápida, mas allá de la que proporciona el propio enunciado.</text:span></text:p>
      <text:p text:style-name="P11"><text:span text:style-name="T47"/></text:p>
      <text:p text:style-name="P11"><text:span text:style-name="T47">Retomemos el problema de encontrar la ruta mas corta por carretera entre dos ciudades. El problema proporcional de información sobre el riesgo de la búsqueda; es decir su función de evaluación que permite conocer la calidad de un estado en comparación a otros. Esto permite cierto margen de maniobra en la toma de decisiones durante la búsqueda para mejorar el proceso. Por ejemplo; supóngase que en el proceso de búsqueda se tienen a medio construir una ruta en el que por el momento actual tiene 1,200km (Todavía no es una solución completa porque la solución no llega al destino). Sin embargo, en una ruta de las analizadas anteriormente se había encontrado una ruta valida con 1,112km. En este caso, se puede abortar la búsqueda actual, ya que se sabe que sera peor que otra que ya se había evaluado anteriormente. Cuando se tiene información que ayuda a guiar la búsqueda de usan técnicas de<text:s/></text:span><text:span text:style-name="T50">búsqueda informada</text:span><text:span text:style-name="T47"><text:s/>que serán tratadas mas adelante.</text:span></text:p>
      <text:p text:style-name="P11"><text:span text:style-name="T47"/></text:p>
      <text:p text:style-name="P11"><text:span text:style-name="T47">Como ejemplo para búsqueda no informada, imaginemos que se han perdido las llaves del coche, se sabe que están en una habitación de la casa, pero no se sabe nada mas. En este caso no queda mas remedio que realizar la búsqueda por toda la habitación hasta encontrarla. Ningún otro dato permite guiar la búsqueda. En este caso solo se usaran técnicas de búsqueda no informada, también conocida como búsqueda a ciegas.</text:span></text:p>
      <text:p text:style-name="P11"><text:span text:style-name="T47"/></text:p>
      <text:p text:style-name="P11"><text:span text:style-name="T47">El siguiente ejemplo ayudara a representar algunos conceptos importantes. Un Puzzle lineal es un puzzle para niños con grandes piezas, se llama puzzle lineal porque todas sus piezas solo pueden unirse en una linea como el siguiente ejemplo.</text:span></text:p>
      <text:p text:style-name="P11"><text:span text:style-name="T47"/></text:p>
      <table:table table:style-name="Table5">
        <table:table-column table:style-name="Table5.A"/>
        <table:table-column table:style-name="Table5.B"/>
        <table:table-column table:style-name="Table5.A"/>
        <table:table-column table:style-name="Table5.A"/>
        <table:table-row table:style-name="Table1.1">
          <table:table-cell table:style-name="Table1.A1">
            <text:p text:style-name="P9"><text:span text:style-name="T47">1</text:span></text:p>
          </table:table-cell>
          <table:table-cell table:style-name="Table1.A1">
            <text:p text:style-name="P9"><text:span text:style-name="T47">2</text:span></text:p>
          </table:table-cell>
          <table:table-cell table:style-name="Table1.A1">
            <text:p text:style-name="P9"><text:span text:style-name="T47">3</text:span></text:p>
          </table:table-cell>
          <table:table-cell table:style-name="Table1.F1">
            <text:p text:style-name="P9"><text:span text:style-name="T47">4</text:span></text:p>
          </table:table-cell>
        </table:table-row>
      </table:table>
      <text:p text:style-name="P11"><text:span text:style-name="T47"/></text:p>
      <text:p text:style-name="P11"><text:span text:style-name="T47">Realmente se podría sacar ventaja de algunas cuestiones, como por ejemplo, la forma de las piezas para probar algunas de las técnicas de búsqueda informada que se verán en el próximo tema. Sin embargo, en este ejemplo, se supone que todas las piezas son exactamente cuadradas y encajan una con otra sin importar el orden.</text:span></text:p>
      <text:p text:style-name="P11"><text:span text:style-name="T47"/></text:p>
      <text:p text:style-name="P11"><text:span text:style-name="T47">Antes de abordar la solución, hay que hacer algunas preguntas que ayuden a definir el problema.</text:span></text:p>
      <text:p text:style-name="P11"><text:span text:style-name="T47"/></text:p>
      <text:p text:style-name="P11"><text:span text:style-name="T47">- ¿Cuál es el espacio de estado del problema?</text:span></text:p>
      <text:p text:style-name="P11"><text:span text:style-name="T47">- ¿Cual es el estado inicial y final (Objetivo)?</text:span></text:p>
      <text:p text:style-name="P11"><text:span text:style-name="T47">- ¿Que operación nos permite pasar de un estado a otro?</text:span></text:p>
      <text:p text:style-name="P11"><text:span text:style-name="T47"/></text:p>
      <table:table table:style-name="Table5">
        <table:table-column table:style-name="Table5.A"/>
        <table:table-column table:style-name="Table5.B"/>
        <table:table-column table:style-name="Table5.A"/>
        <table:table-column table:style-name="Table5.A"/>
        <table:table-row table:style-name="Table1.1">
          <table:table-cell table:style-name="Table1.A1">
            <text:p text:style-name="P9"><text:span text:style-name="T47">1</text:span></text:p>
          </table:table-cell>
          <table:table-cell table:style-name="Table1.A1">
            <text:p text:style-name="P9"><text:span text:style-name="T47">2</text:span></text:p>
          </table:table-cell>
          <table:table-cell table:style-name="Table1.A1">
            <text:p text:style-name="P9"><text:span text:style-name="T47">3</text:span></text:p>
          </table:table-cell>
          <table:table-cell table:style-name="Table1.F1">
            <text:p text:style-name="P9"><text:span text:style-name="T47">4</text:span></text:p>
          </table:table-cell>
        </table:table-row>
      </table:table>
      <text:p text:style-name="P11"><text:span text:style-name="T47"/></text:p>
      <text:p text:style-name="P11"><text:span text:style-name="T47">En cuanto al espacio de estados, un estado puede ser cualquier ordenación posible de cuatro piezas, así que se tendrán 4!=24 posibles estados. Aunque como se ha analizado previamente se puede saber que a mayor numero de piezas se volvería problema intratable.</text:span></text:p>
      <text:p text:style-name="P11"><text:span text:style-name="T47"/></text:p>
      <text:p text:style-name="P11"><text:span text:style-name="T47">Es necesario definir una<text:s/></text:span><text:span text:style-name="T50">operación<text:s/></text:span><text:span text:style-name="T47">que permita ir explorando los posibles estados. Una operación básica es intercambiar dos piezas continuas. Para el caso del Puzzle de 4 elementos, se tendrán 3 operaciones posibles.</text:span></text:p>
      <text:p text:style-name="P11"><text:span text:style-name="T47">- Intercambiar las dos piezas de la derecha: Operación<text:s/></text:span><text:span text:style-name="T50">D.</text:span></text:p>
      <text:p text:style-name="P11"><text:span text:style-name="T47">- Intercambiar las dos piezas centrales: Operación<text:s/></text:span><text:span text:style-name="T50">C.</text:span></text:p>
      <text:p text:style-name="P11"><text:span text:style-name="T47">- Intercambiar las dos piezas de la izquierda: Operación</text:span><text:span text:style-name="T50"><text:s/>I.</text:span></text:p>
      <text:p text:style-name="P11"><text:span text:style-name="T47"/></text:p>
      <text:p text:style-name="P11"><text:span text:style-name="T47">Por ultimo de necesita una operación de evaluación. La mas lógica seria que evaluara cuantas piezas hay, bien colocadas, pero como se quiere mostrar las técnicas de búsqueda no informada, es necesario obviar ese dato y mostrar la función de evaluación. Esto comprobara se se ha llegado al estado objetivo o no. en el siguiente tema se retomara este mismo problema para resolverlo usando técnicas de búsqueda informada.</text:span></text:p>
      <text:p text:style-name="P11"><text:span text:style-name="T47"/></text:p>
      <text:p text:style-name="P12"><text:span text:style-name="T47">REPRESENTACIÓN DE ESTADOS: ÁRBOLES Y GRAFOS<text:s/></text:span></text:p>
      <text:p text:style-name="P11"><text:span text:style-name="T47"/></text:p>
      <text:p text:style-name="P11"><text:span text:style-name="T47">Ahora se sabe algo mas sobre el problema, se necesita plantear otras cuestiones referentes a la implementación para la solución en el ordenador. La primera y la mas básica es: como se representa el Puzzle y sus estados en un programita? Parece una buena idea representar el puzzle como un array de números enteros con una dimensión de 4. Usando esta representación algunos posibles estados podrían ser:</text:span></text:p>
      <text:p text:style-name="P11"><text:span text:style-name="T47"/></text:p>
      <text:p text:style-name="P11"><text:span text:style-name="T47">[2,1,4,3]</text:span></text:p>
      <text:p text:style-name="P11"><text:span text:style-name="T47">[1,2,4,3]</text:span></text:p>
      <text:p text:style-name="P11"><text:span text:style-name="T47">[4,2,3,1]</text:span></text:p>
      <text:p text:style-name="P11"><text:span text:style-name="T47"/></text:p>
      <text:p text:style-name="P11"><text:span text:style-name="T47">Cualquiera de ellos es valido. Si se aplica cada uno de los operadores que se han definido (I,C,D) los arreglos se transformaran de la siguiente manera:</text:span></text:p>
      <text:p text:style-name="P11"><text:span text:style-name="T47">[2,1,4,3] <text:s text:c="15"/>[1,2,4,3] Operador I</text:span></text:p>
      <text:p text:style-name="P11"><text:span text:style-name="T47">[1,2,4,3] <text:s text:c="16"/>[1,4,2,3] Operador C</text:span></text:p>
      <text:p text:style-name="P11"><text:span text:style-name="T47">[4,2,3,1] <text:s text:c="16"/>[4,2,3,1] Operador D</text:span></text:p>
      <text:p text:style-name="P11"><text:span text:style-name="T47"/></text:p>
      <text:p text:style-name="P11"><text:span text:style-name="T47">La forma de representar los estados y el resultado de aplicar un operador es un árbol que muestra como evolucionan los estados al ir aplicando los operadores que se han definido.</text:span></text:p>
      <text:p text:style-name="P11"><text:span text:style-name="T47"/></text:p>
      <text:p text:style-name="P11"><text:span text:style-name="T47"/></text:p>
      <text:p text:style-name="P11"><text:span text:style-name="T47">TAREA: generar la complejidad de estados partiendo del 1,2,3,4 (24)</text:span></text:p>
      <text:p text:style-name="P15">[1,2,3,4] (Estado Inicial)</text:p>
      <table:table table:style-name="Table6">
        <table:table-column table:style-name="Table6.A"/>
        <table:table-row table:style-name="Table1.1">
          <table:table-cell table:style-name="Table6.A1">
            <text:p text:style-name="P15">[2,1,3,4],[1,3,2,4],[1,2,4,3]</text:p>
          </table:table-cell>
        </table:table-row>
      </table:table>
      <text:p text:style-name="P15">[2,3,1,4],[2,1,4,3],[3,1,2,4],[1,3,4,2],[1,4,2,3]</text:p>
      <text:p text:style-name="P15">[3,2,1,4],[2,3,4,1],[2,4,1,3],[3,1,4,2],[1,4,3,2],[4,1,2,3]</text:p>
      <table:table table:style-name="Table7">
        <table:table-column table:style-name="Table7.A"/>
        <table:table-row table:style-name="Table1.1">
          <table:table-cell table:style-name="Table6.A1">
            <text:p text:style-name="P15">[3,2,4,1],[2,4,3,1],[4,2,1,3],[3,4,1,2],[4,1,3,2]</text:p>
          </table:table-cell>
        </table:table-row>
      </table:table>
      <text:p text:style-name="P15">[3,4,2,1],[4,2,3,1],[4,3,1,2]</text:p>
      <table:table table:style-name="Table6">
        <table:table-column table:style-name="Table6.A"/>
        <table:table-row table:style-name="Table1.1">
          <table:table-cell table:style-name="Table6.A1">
            <text:p text:style-name="P15">[4,3,2,1] (Estado más alejado o "invertido")</text:p>
          </table:table-cell>
        </table:table-row>
      </table:table>
      <text:p text:style-name="P11"><text:span text:style-name="T47"/></text:p>
      <text:p text:style-name="P11"><text:span text:style-name="T47"/></text:p>
      <text:p text:style-name="P11"><text:span text:style-name="T47"/></text:p>
      <text:p text:style-name="P11"><text:span text:style-name="T47"/></text:p>
      <text:p text:style-name="P11"><text:span text:style-name="T47"/></text:p>
      <text:p text:style-name="P11"><text:span text:style-name="T47"/></text:p>
      <text:p text:style-name="P11"><text:span text:style-name="T47"/></text:p>
      <text:p text:style-name="P11"><text:span text:style-name="T47"/></text:p>
      <text:p text:style-name="P11"><text:span text:style-name="T47"/></text:p>
      <text:p text:style-name="P11"><text:span text:style-name="T47"/></text:p>
      <text:p text:style-name="P11"><text:span text:style-name="T47"/></text:p>
      <text:p text:style-name="P11"><text:span text:style-name="T47"/></text:p>
      <text:p text:style-name="P11"><text:span text:style-name="T47"/></text:p>
      <text:p text:style-name="P11"><text:span text:style-name="T47">Dentro de la nomenclatura usada en la teoría de árboles y grafos, se llamarán<text:s/></text:span><text:span text:style-name="T50">nodo<text:s/></text:span><text:span text:style-name="T47">a cada uno de los estados. A los nodos resultantes después de aplicar los operadores se le llamaran<text:s/></text:span><text:span text:style-name="T50">hijos</text:span><text:span text:style-name="T47"><text:s/>y al nodo que generan los hijos se les llamará<text:s/></text:span><text:span text:style-name="T50">Padre.</text:span><text:span text:style-name="T47"><text:s/>Todos los nodos hijos del mismo padre se le denominan<text:s/></text:span><text:span text:style-name="T50">hermanos.<text:s/></text:span><text:span text:style-name="T47">El nodo superior es el único que no tiene padre, se le llamará nodo<text:s/></text:span><text:span text:style-name="T50">raíz.<text:s/></text:span><text:span text:style-name="T47">En este caso se corresponde con el estado inicial [3,1,2,4]. a un nodo que no tiene hijos se le llamará<text:s/></text:span><text:span text:style-name="T50">hoja.<text:s/></text:span><text:span text:style-name="T47">Un nodo que no tenga padre y al menos un hijo se le llamará<text:s/></text:span><text:span text:style-name="T50">rama.<text:s/></text:span></text:p>
      <text:p text:style-name="P11"><text:span text:style-name="T47"/></text:p>
      <text:p text:style-name="P11"><text:span text:style-name="T47">Como se tienen tres operadores, al aplicarlo a un nodo, en este caso se dice que el árbol tiene un<text:s/></text:span><text:span text:style-name="T50">factor de ramificación<text:s/></text:span><text:span text:style-name="T47">de 3, ademas cada vez que se aplica un operador se dice que se ha descendido un<text:s/></text:span><text:span text:style-name="T50">nivel<text:s/></text:span><text:span text:style-name="T47">en la jerarquizar del árbol.<text:s/></text:span></text:p>
      <text:p text:style-name="P11"><text:span text:style-name="T47"/></text:p>
      <text:p text:style-name="P11"><text:span text:style-name="T47">Si se observa el desarrollo del árbol, puede comprobarse que hay estados que son iguales.</text:span></text:p>
      <text:p text:style-name="P11"><text:span text:style-name="T47">Por ejemplo: si el estado inicial aplica el operador D y únicamente se vuelve a aplicar de nuevo se obtiene el estado inicial, en este caso se pueden moldear los estados como un grafo, que es una estructura similar al árbol pero que tiene dos ciclos. Los grafos suelen representarse uniendo sus nodos con lineas o flechas curvas si se puede pasar de un estado a otro en ambos sentidos se usara una linea. Sin embargo la transición de un estado a otro solo puede darse en un sentido, se usara una flecha para iniciarlo.</text:span></text:p>
      <text:p text:style-name="P11"><text:span text:style-name="T47"/></text:p>
      <text:p text:style-name="P11"><text:span text:style-name="T47">Cuando el desarrollo se encuentra en ciclos, como ha pasado en este caso, la busqueda de la solucion podria no encontrarse nunca, ya que el programa podria quedar indefinidamente en esos ciclo. Por lo que se tendra que evitarlos, una fomra habitual de hacerlo es “recordar” que nodo se han visitado almacenándolos en memoria y cada vez que se llegue a un nuevo nodo, comprobar que se ha visitado con anterioridad.</text:span></text:p>
      <text:p text:style-name="P11"><text:span text:style-name="T47"/></text:p>
      <text:p text:style-name="P11"><text:span text:style-name="T47"/></text:p>
      <text:p text:style-name="P11"><text:span text:style-name="T47"/></text:p>
      <text:p text:style-name="P16"><text:span text:style-name="T47">[3,1,2,4]<text:tab/>[1,3,2,4]</text:span></text:p>
      <text:p text:style-name="P16"><text:span text:style-name="T47"/></text:p>
      <text:p text:style-name="P16"><text:span text:style-name="T47"/></text:p>
      <text:p text:style-name="P16"><text:span text:style-name="T47"/></text:p>
      <text:p text:style-name="P11"><text:span text:style-name="T47">Regresa al mismo estado en bucle***</text:span></text:p>
      <text:p text:style-name="P11"><text:span text:style-name="T47"/></text:p>
      <text:p text:style-name="P11"><text:span text:style-name="T47">Encontrar una solucion a un problema consistirá en hacer una búsqueda en el árbol de estados o en un grafo para encontrar un nodo que contenga un estado objetivo, en general el recorrido de un árbol(grafo), se compone de los siguientes pasos:</text:span></text:p>
      <text:list text:style-name="WWNum1" xml:id="list-7cab4a79-7425-4e0c-8a30-9a33976cd1d4">
        <text:list-item>
          <text:p text:style-name="P17"><text:span text:style-name="T47">Seleccionar el nodo raiz en una lista que contendra aquellos nodos que estan pendientes de visitar. A esta lista se le llamara<text:s/></text:span><text:span text:style-name="T50">frontera<text:s/></text:span><text:span text:style-name="T47">(Tambien se le conoce como lista abierta)</text:span></text:p>
        </text:list-item>
        <text:list-item>
          <text:p text:style-name="P17"><text:span text:style-name="T47">Seleccionar un nodo de la lista nodos frontera y comprobar si es un nodo objetivo, Si lo es, se ha terminado.</text:span></text:p>
        </text:list-item>
        <text:list-item>
          <text:p text:style-name="P17"><text:span text:style-name="T47">Generar todos los hijos del nodo seleccionado en paso 2, aplicando los operadores que se han definido.(Esto es lo que se llama expandir un nodo, añadir los nuevos nodos hijo a la lista de nodos frontera)</text:span></text:p>
        </text:list-item>
        <text:list-item>
          <text:p text:style-name="P17"><text:span text:style-name="T47">Volver al paso 2 hasta que la lista de nodos frontera este vacía.</text:span></text:p>
        </text:list-item>
      </text:list>
      <text:p text:style-name="P11"><text:span text:style-name="T47"/></text:p>
      <text:p text:style-name="P11"><text:span text:style-name="T47">Si en lugar de un arbol se esta trabajando con un grafo, el proceso cambia ligeramente</text:span></text:p>
      <text:list text:style-name="WWNum21" xml:id="list-6711a6c8-8575-4cde-bb1a-4f1feccdbb91">
        <text:list-item>
          <text:number>1.</text:number>
          <text:p text:style-name="P18"><text:span text:style-name="T47">Seleccionar el nodo raiz y almacenarlo en la lsita de nodos frontera</text:span></text:p>
        </text:list-item>
        <text:list-item>
          <text:number>2.</text:number>
          <text:p text:style-name="P18"><text:span text:style-name="T47">Seleccionar un nodo de la lista de nodos frontera y comprobar si es un nodo objetivo, si lo es se ha terminado ademas almacenamos el nodo en una lista llamada “visitados” y si no esta añadirlo a la lista de nodos frontera.</text:span></text:p>
        </text:list-item>
        <text:list-item>
          <text:number>3.</text:number>
          <text:p text:style-name="P18"><text:span text:style-name="T47">Generar todos los nodos hijo del nodo seleccionado en el paso 2, aplicando los operadores que se han definido. Para cada hijo comprobar que no este en la lista de nodos visitados y si no esta añadirla a la lista de nodos frontera</text:span></text:p>
        </text:list-item>
        <text:list-item>
          <text:number>4.</text:number>
          <text:p text:style-name="P18"><text:span text:style-name="T47">Volver al paso 2 hasta que la lista de nodos frontera este vacía.</text:span></text:p>
        </text:list-item>
      </text:list>
      <text:p text:style-name="P11"><text:span text:style-name="T47"/></text:p>
      <text:p text:style-name="P11"><text:span text:style-name="T47">Busqueda en amplitud</text:span></text:p>
      <text:p text:style-name="P11"><text:span text:style-name="T47"/></text:p>
      <text:p text:style-name="P11"><text:span text:style-name="T47">El proceso de búsqueda que se acaba de presentar es un procedimiento generico que puede dar lugar a variaciones, La primera que se va a presentar se llama búsqueda en amplitud o Breadth First Search(BFS), Esta busqueda recorre el arbol por niveles, Es decir.</text:span></text:p>
      <text:p text:style-name="P11"><text:span text:style-name="T47"/></text:p>
      <text:list text:style-name="WWNum3" xml:id="list-30265c7d-a27a-45d6-859f-9abf8da4b951">
        <text:list-item>
          <text:p text:style-name="P19"><text:span text:style-name="T47">Primero se visita el nodo raiz<text:s/></text:span></text:p>
        </text:list-item>
        <text:list-item>
          <text:p text:style-name="P19"><text:span text:style-name="T47">Seguidamente se visitan todos sus hijos</text:span></text:p>
        </text:list-item>
        <text:list-item>
          <text:p text:style-name="P19"><text:span text:style-name="T47">Para cada hijo en el paso anterior, se visitan todos sus hijos y asi sucesivamente.</text:span></text:p>
        </text:list-item>
      </text:list>
      <text:p text:style-name="P11"><text:span text:style-name="T47"/></text:p>
      <text:p text:style-name="P20"><text:span text:style-name="T47">Este recorrido se implementa en la practica usando una cola (FIFO) First in First out para la lista de nodos frontera, una cola FIFO es una estructura de datos en la que se puede hacer 2 operaciones principales. Almacenar un dato y scar un dato. La particularidad de las colas FIFO es que cuando se saca un dato este se extrae en el mismo orden. A continuacion se muestra el algoritmo se busqueda</text:span></text:p>
      <text:p text:style-name="P11"><text:span text:style-name="T47"/></text:p>
      <text:p text:style-name="P11"><text:span text:style-name="T47"/></text:p>
      <text:p text:style-name="P11"><draw:custom-shape draw:style-name="gr6" xml:id="shape-124" draw:id="shape-124" draw:name="Forma 25" draw:z-index="137" svg:x="354.89825261600pt" svg:y="90.70881856000pt" text:anchor-type="paragraph" svg:width="76.56391216580pt" svg:height="69.08043463460pt"><text:p text:style-name="P4">3</text:p><draw:enhanced-geometry svg:viewBox="0 0 21600 21600" draw:modifiers="" draw:enhanced-path="U10800 10800 10800 10800 0 360 Z N"/><draw:glue-point draw:id="4" svg:x="0.50000000000pt" svg:y="0.50000000000pt" draw:align="center"/><draw:glue-point draw:id="5" svg:x="0.50000000000pt" svg:y="0.50000000000pt" draw:align="center"/></draw:custom-shape><draw:custom-shape draw:style-name="gr6" xml:id="shape-125" draw:id="shape-125" draw:name="Forma 26" draw:z-index="138" svg:x="276.18000600940pt" svg:y="193.80506015460pt" text:anchor-type="paragraph" svg:width="76.56391216580pt" svg:height="69.08043463460pt"><text:p text:style-name="P4">6</text:p><draw:enhanced-geometry svg:viewBox="0 0 21600 21600" draw:modifiers="" draw:enhanced-path="U10800 10800 10800 10800 0 360 Z N"/><draw:glue-point draw:id="4" svg:x="0.50000000000pt" svg:y="0.50000000000pt" draw:align="center"/><draw:glue-point draw:id="5" svg:x="0.50000000000pt" svg:y="0.50000000000pt" draw:align="center"/></draw:custom-shape><draw:custom-shape draw:style-name="gr6" xml:id="shape-126" draw:id="shape-126" draw:name="Forma 27" draw:z-index="139" svg:x="456.94567349600pt" svg:y="190.12001440060pt" text:anchor-type="paragraph" svg:width="76.56391216580pt" svg:height="69.08043463460pt"><text:p text:style-name="P4">7</text:p><draw:enhanced-geometry svg:viewBox="0 0 21600 21600" draw:modifiers="" draw:enhanced-path="U10800 10800 10800 10800 0 360 Z N"/><draw:glue-point draw:id="4" svg:x="0.50000000000pt" svg:y="0.50000000000pt" draw:align="center"/><draw:glue-point draw:id="5" svg:x="0.50000000000pt" svg:y="0.50000000000pt" draw:align="center"/></draw:custom-shape><draw:custom-shape draw:style-name="gr6" xml:id="shape-127" draw:id="shape-127" draw:name="Forma 28" draw:z-index="140" svg:x="-51.56229405020pt" svg:y="191.19718162100pt" text:anchor-type="paragraph" svg:width="76.56391216580pt" svg:height="69.08043463460pt"><text:p text:style-name="P4">4</text:p><draw:enhanced-geometry svg:viewBox="0 0 21600 21600" draw:modifiers="" draw:enhanced-path="U10800 10800 10800 10800 0 360 Z N"/><draw:glue-point draw:id="4" svg:x="0.50000000000pt" svg:y="0.50000000000pt" draw:align="center"/><draw:glue-point draw:id="5" svg:x="0.50000000000pt" svg:y="0.50000000000pt" draw:align="center"/></draw:custom-shape><draw:custom-shape draw:style-name="gr6" xml:id="shape-128" draw:id="shape-128" draw:name="Forma 29" draw:z-index="141" svg:x="142.95142874940pt" svg:y="188.73103561640pt" text:anchor-type="paragraph" svg:width="76.56391216580pt" svg:height="69.08043463460pt"><text:p text:style-name="P4">5</text:p><draw:enhanced-geometry svg:viewBox="0 0 21600 21600" draw:modifiers="" draw:enhanced-path="U10800 10800 10800 10800 0 360 Z N"/><draw:glue-point draw:id="4" svg:x="0.50000000000pt" svg:y="0.50000000000pt" draw:align="center"/><draw:glue-point draw:id="5" svg:x="0.50000000000pt" svg:y="0.50000000000pt" draw:align="center"/></draw:custom-shape><draw:path draw:style-name="gr2" xml:id="shape-129" draw:id="shape-129" draw:name="Línea 1" draw:z-index="142" svg:width="98.39072163180pt" svg:height="63.75129154420pt" svg:x="108.00018709800pt" svg:y="35.14966719200pt" svg:viewBox="0 0 98 64" text:anchor-type="paragraph" svg:d="M98.3907 0L0 63.7513" calligra:nodeTypes="cc"><draw:glue-point draw:id="4" svg:x="0.50000000000pt" svg:y="0.50000000000pt" draw:align="center"/><draw:glue-point draw:id="5" svg:x="0.50000000000pt" svg:y="0.50000000000pt" draw:align="center"/></draw:path><draw:path draw:style-name="gr2" xml:id="shape-130" draw:id="shape-130" draw:name="Línea 2" draw:z-index="143" svg:width="53.88670752580pt" svg:height="61.39853156280pt" svg:x="-5.44252911360pt" svg:y="139.20968998380pt" svg:viewBox="0 0 54 61" text:anchor-type="paragraph" svg:d="M53.8867 0L0 61.3985" calligra:nodeTypes="cc"><draw:glue-point draw:id="4" svg:x="0.50000000000pt" svg:y="0.50000000000pt" draw:align="center"/><draw:glue-point draw:id="5" svg:x="0.50000000000pt" svg:y="0.50000000000pt" draw:align="center"/></draw:path><draw:path draw:style-name="gr2" xml:id="shape-131" draw:id="shape-131" draw:name="Línea 3" draw:z-index="144" svg:width="36.53864597620pt" svg:height="62.36231276000pt" svg:x="119.70729399340pt" svg:y="138.24590878660pt" svg:viewBox="0 0 37 62" text:anchor-type="paragraph" svg:d="M0 0L36.5386 62.3623" calligra:nodeTypes="cc"><draw:glue-point draw:id="4" svg:x="0.50000000000pt" svg:y="0.50000000000pt" draw:align="center"/><draw:glue-point draw:id="5" svg:x="0.50000000000pt" svg:y="0.50000000000pt" draw:align="center"/></draw:path><draw:path draw:style-name="gr2" xml:id="shape-132" draw:id="shape-132" draw:name="Línea 4" draw:z-index="145" svg:width="41.38589846800pt" svg:height="47.84890179040pt" svg:x="331.93758291800pt" svg:y="150.88845037340pt" svg:viewBox="0 0 41 48" text:anchor-type="paragraph" svg:d="M0 47.8489L41.3859 0" calligra:nodeTypes="cc"><draw:glue-point draw:id="4" svg:x="0.50000000000pt" svg:y="0.50000000000pt" draw:align="center"/><draw:glue-point draw:id="5" svg:x="0.50000000000pt" svg:y="0.50000000000pt" draw:align="center"/></draw:path><draw:path draw:style-name="gr2" xml:id="shape-133" draw:id="shape-133" draw:name="Línea 5" draw:z-index="146" svg:width="59.24419712200pt" svg:height="71.71665967400pt" svg:x="417.82749549200pt" svg:y="144.85064463800pt" svg:viewBox="0 0 59 72" text:anchor-type="paragraph" svg:d="M0 0L59.2442 71.7167" calligra:nodeTypes="cc"><draw:glue-point draw:id="4" svg:x="0.50000000000pt" svg:y="0.50000000000pt" draw:align="center"/><draw:glue-point draw:id="5" svg:x="0.50000000000pt" svg:y="0.50000000000pt" draw:align="center"/></draw:path><draw:path draw:style-name="gr2" xml:id="shape-134" draw:id="shape-134" draw:name="Línea 6" draw:z-index="147" svg:width="115.37027860600pt" svg:height="70.74720917564pt" svg:x="263.62250394000pt" svg:y="27.64351245616pt" svg:viewBox="0 0 115 71" text:anchor-type="paragraph" svg:d="M115.37 70.7472L0 0" calligra:nodeTypes="cc"><draw:glue-point draw:id="4" svg:x="0.50000000000pt" svg:y="0.50000000000pt" draw:align="center"/><draw:glue-point draw:id="5" svg:x="0.50000000000pt" svg:y="0.50000000000pt" draw:align="center"/></draw:path><text:span text:style-name="T47"/></text:p>
      <text:p text:style-name="P21"><draw:frame draw:style-name="gr7" xml:id="shape-135" draw:id="shape-135" draw:z-index="0" svg:width="458.07953372800pt" svg:height="679.18227896800pt" svg:x="0.00000000000pt" svg:y="-339.59113948400pt" text:anchor-type="as-char"><draw:image xlink:type="simple" xlink:show="embed" xlink:actuate="onLoad" xlink:href="Pictures/image1.png"/></draw:frame></text:p>
      <text:p text:style-name="P22"><draw:frame draw:style-name="gr7" xml:id="shape-136" draw:id="shape-136" draw:z-index="1" svg:width="336.47302384600pt" svg:height="260.16423023240pt" svg:x="0.00000000000pt" svg:y="-130.08211511620pt" text:anchor-type="as-char"><draw:image xlink:type="simple" xlink:show="embed" xlink:actuate="onLoad" xlink:href="Pictures/image2.png"/></draw:frame><draw:frame draw:style-name="gr7" xml:id="shape-137" draw:id="shape-137" draw:z-index="2" svg:width="382.96129335800pt" svg:height="240.80356677100pt" svg:x="0.00000000000pt" svg:y="-120.40178338550pt" text:anchor-type="as-char"><draw:image xlink:type="simple" xlink:show="embed" xlink:actuate="onLoad" xlink:href="Pictures/image3.png"/></draw:frame><text:span text:style-name="T51"><text:s/></text:span></text:p>
      <text:p text:style-name="P22"><draw:frame draw:style-name="gr7" xml:id="shape-138" draw:id="shape-138" draw:z-index="3" svg:width="498.61503702200pt" svg:height="369.35497057400pt" svg:x="0.00000000000pt" svg:y="-184.67748528700pt" text:anchor-type="as-char"><draw:image xlink:type="simple" xlink:show="embed" xlink:actuate="onLoad" xlink:href="Pictures/image4.png"/></draw:frame><text:soft-page-break/></text:p>
      <text:p text:style-name="P22"><text:span text:style-name="T47">A continuacion se muestra el algoritmo de busqueda en amplitud en pseucodigo:</text:span></text:p>
      <text:p text:style-name="P11"><text:span text:style-name="T47"/></text:p>
      <text:p text:style-name="P13"><text:span text:style-name="T47">Nodo_inicial = estado inicial</text:span></text:p>
      <text:p text:style-name="P13"><text:span text:style-name="T47">Nodos_frontera = Cola FIFO</text:span></text:p>
      <text:p text:style-name="P13"><text:span text:style-name="T47">nodos_visitados = lista</text:span></text:p>
      <text:p text:style-name="P13"><text:span text:style-name="T47">Almacenar Nodo_iicial en nodos_frontera</text:span></text:p>
      <text:p text:style-name="P13"><text:span text:style-name="T47">Mientras los nodos_frontera no se encuentren vacio:</text:span></text:p>
      <text:p text:style-name="P13"><text:span text:style-name="T47"><text:tab/>Nodo_Actual = Extraer nodo_frontera</text:span></text:p>
      <text:p text:style-name="P13"><text:span text:style-name="T47"><text:tab/>Si nodo_actual == solucion:</text:span></text:p>
      <text:p text:style-name="P13"><text:span text:style-name="T47"><text:tab/><text:tab/>Salir con la solucion</text:span></text:p>
      <text:p text:style-name="P11"><text:span text:style-name="T47"><text:tab/>Introducir nodo actual en nodos visitados</text:span></text:p>
      <text:p text:style-name="P11"><text:span text:style-name="T47"><text:tab/>Por cada operador:</text:span></text:p>
      <text:p text:style-name="P11"><text:span text:style-name="T47"><text:tab/><text:tab/>Nodo hijo= operador(nodo-actual)<text:tab/></text:span></text:p>
      <text:p text:style-name="P11"><text:span text:style-name="T47"><text:tab/><text:tab/>Si nodohijo no esta en nodos vistados ni nodos_frontera:</text:span></text:p>
      <text:p text:style-name="P11"><text:span text:style-name="T47"><text:tab/><text:tab/><text:tab/>introducirnodo_hijo en nodos_frontera</text:span></text:p>
      <text:p text:style-name="P11"><text:span text:style-name="T47"/></text:p>
      <text:p text:style-name="P11"><text:span text:style-name="T47"/></text:p>
      <text:p text:style-name="P11"><text:span text:style-name="T47">Hay que llevar a la practica el algoritmo haciendo un programa para resolver el problema del puzzle lineal, a lo largo del curso será necesrio usar la clase nodo es una sencilla implementacion de la estructura de datos del arbol de la que se ha hablado en esta seccio. El archivo se llamara arbol.py</text:span></text:p>
      <text:p text:style-name="P11"><text:span text:style-name="T47"/></text:p>
      <text:p text:style-name="P11"><text:span text:style-name="T47"/></text:p>
      <text:p text:style-name="P11"><text:span text:style-name="T47"/></text:p>
      <text:p text:style-name="P11"><text:span text:style-name="T47"/></text:p>
      <text:p text:style-name="P11"><text:span text:style-name="T47"/></text:p>
      <text:p text:style-name="P11"><text:span text:style-name="T47"/></text:p>
      <text:p text:style-name="P11"><text:span text:style-name="T47"/></text:p>
      <text:p text:style-name="P11"><text:span text:style-name="T47"/></text:p>
      <text:p text:style-name="P11"><text:span text:style-name="T47"/></text:p>
      <text:p text:style-name="P11"><text:span text:style-name="T47"/></text:p>
      <text:p text:style-name="P11"><text:span text:style-name="T47"/></text:p>
      <text:p text:style-name="P11"><text:span text:style-name="T47"/></text:p>
      <text:p text:style-name="P11"><text:span text:style-name="T47"/></text:p>
      <text:p text:style-name="P11"><text:span text:style-name="T47"/></text:p>
      <text:p text:style-name="P11"><text:span text:style-name="T47"/></text:p>
      <text:p text:style-name="P11"><text:span text:style-name="T47"/></text:p>
      <text:p text:style-name="P11"><text:span text:style-name="T47"/></text:p>
      <text:p text:style-name="P11"><text:span text:style-name="T47"/></text:p>
      <text:p text:style-name="P11"><text:span text:style-name="T47"/></text:p>
      <text:p text:style-name="P11"><text:span text:style-name="T47"/></text:p>
      <text:p text:style-name="P11"><text:span text:style-name="T47"/></text:p>
      <text:p text:style-name="P11"><text:span text:style-name="T47"/></text:p>
      <text:p text:style-name="P11"><text:span text:style-name="T47"/></text:p>
      <text:p text:style-name="P11"><text:span text:style-name="T47"/></text:p>
      <text:p text:style-name="P11"><text:span text:style-name="T47"/></text:p>
      <text:p text:style-name="P11"><text:span text:style-name="T47"/></text:p>
      <text:p text:style-name="P11"><text:span text:style-name="T47"/></text:p>
      <text:p text:style-name="P11"><text:span text:style-name="T47"/></text:p>
      <text:p text:style-name="P11"><text:span text:style-name="T47"/></text:p>
      <text:p text:style-name="P11"><text:span text:style-name="T47"/></text:p>
      <text:p text:style-name="P11"><text:span text:style-name="T47"/></text:p>
      <text:p text:style-name="P23"><text:span text:style-name="T52">La ejecución del programa anterior muestra el siguiente resultado:</text:span></text:p>
      <text:p text:style-name="P23"><text:span text:style-name="T52"/></text:p>
      <text:p text:style-name="P23"><text:span text:style-name="T52">[[4, 2, 3, 1], [2,4,3,1], [2, 3, 4, 1], [2, 3, 1, 4], [2, 1, 3, 4], [1, 2, 3, 4]]</text:span></text:p>
      <text:p text:style-name="P23"><text:span text:style-name="T52"/></text:p>
      <text:p text:style-name="P23"><text:span text:style-name="T52">La función encargada de implementar la búsqueda en amplitud se llama buscar_solucion_BFS( ), <text:s/>que es invocada con dos parámetros. El primero es el estado inicial, que en este caso es [4, 2, 3, 1]. El segundo parámetro es el estado objetivo, es decir la solución: [1, 2, 3, 4]. La función retorna con el nodo solución si lo ha encontrado. Para conocer el camino concreto desde el nodo raíz al nodo objetivo, solo hay que recorrer el camino de manea inversa. Como cada nodo tiene asignado un padre, solo se tiene que usar la función get_padre( ), para recorrer el camino.</text:span></text:p>
      <text:p text:style-name="P23"><text:span text:style-name="T52"/></text:p>
      <text:p text:style-name="P23"><text:span text:style-name="T52">Dentro de la función buscar_solucion_BFS( ) <text:s/>lo primero que se hace es inicializar las listas de nodos frontera y nodos visitados. Tambien se crea el nodo inicial con el valor del primer parámetro de la función y se añade a la lista de nodos frontera.</text:span></text:p>
      <text:p text:style-name="P23"><text:span text:style-name="T52"/></text:p>
      <text:p text:style-name="P23"><text:span text:style-name="T52">La siguiente porción de código es un bucle o ciclo y se repite mientras haya elementos en la lista de nodos frontera o no se haya alcanzado la solución. El primer paso es extraer el primer nodo pendiente de la cola de nodos frontera e insertarlo en la lisa de nodos visitados. <text:s/>Si el nodo es una solución, se sale del bucle devolviendo el nodo. Si no, se expande el nodo aplicando los operadores I, C, D y se generan sus hijos, si los hijos no están en la lista de nodos visitados, se añaden a la cola de nodos frontera.</text:span></text:p>
      <text:p text:style-name="P23"><text:span text:style-name="T52"/></text:p>
      <text:p text:style-name="P23"><text:span text:style-name="T52">La búsqueda en amplitud tienes algunas propiedades que vale la pena señalar, cabe preguntarse si la búsqueda en amplitud tiene una solución. En efecto, es fácil comprobar que, si existe una solución, la búsqueda en amplitud acabara encontrándola. Otra cuestión es, en ¿Que tiempo? Cuando un algoritmo se sabe que siempre encontrara la solución si se le deja el tiempo suficiente, se dice que el algoritmo es completo y se refiere a esta característica como completitud de un algoritmo.<text:s/></text:span></text:p>
      <text:p text:style-name="P23"><text:span text:style-name="T52"/></text:p>
      <text:p text:style-name="P23"><text:span text:style-name="T52">Sabiendo que siempre se encontrara la solución, otra cuestión que se tiene que plantear es que, si la solución es la mejor posible, por lo tanto, se dirá que la solución es óptima si no es posible encontrar otra solución diferente con otro número de trasbordos menor.</text:span></text:p>
      <text:p text:style-name="P23"><text:span text:style-name="T52"/></text:p>
      <text:p text:style-name="P23"><text:span text:style-name="T52">Sin embargo, en el ejemplo del viaje por carretera, el objetivo era otro: reducir el número de km. Por lo tanto, una solución será optima si no es posible encontrar una ruta con menor de km.</text:span></text:p>
      <text:p text:style-name="P23"><text:span text:style-name="T52"/></text:p>
      <text:p text:style-name="P23"><text:span text:style-name="T52">En el caso del Puzzle lineal, se podría plantear se podría plantear que una solución será optima si no es posible encontrar otra diferente que resuelva el Puzzle en el menor número de movimientos, si se observa que por cada movimiento se baja un nivel en el árbol. Se notaría que a menos profundidad se encuentra la solución, menos movimientos habrán sido necesarios para llegar a ella. Como la búsqueda en amplitud recorre el árbol por niveles, queda claro que, en este caso, la solución que se encuentra será optima.</text:span></text:p>
      <text:p text:style-name="P23"><text:span text:style-name="T52"/></text:p>
      <text:p text:style-name="P23"><text:span text:style-name="T52">Con el problema de los traslados de viaje en avión ocurre algo parecido. Cada trasbordo se traduce en un descenso en el nivel del árbol, por lo que la solución que se encuentra con la búsqueda en amplitud tambien será optima.</text:span></text:p>
      <text:p text:style-name="P23"><text:span text:style-name="T52"/></text:p>
      <text:p text:style-name="P23"><text:span text:style-name="T52"/></text:p>
      <text:p text:style-name="P23"><text:span text:style-name="T52"/></text:p>
      <text:p text:style-name="P23"><text:span text:style-name="T52"/></text:p>
      <text:p text:style-name="P23"><text:span text:style-name="T52"/></text:p>
      <text:p text:style-name="P23"><text:span text:style-name="T52"/></text:p>
      <text:p text:style-name="P23"><text:span text:style-name="T52"/></text:p>
      <text:p text:style-name="P23"><text:span text:style-name="T52"/></text:p>
      <text:p text:style-name="P23"><text:span text:style-name="T52"/></text:p>
      <text:p text:style-name="P23"><text:span text:style-name="T52"/></text:p>
      <text:p text:style-name="P23"><text:span text:style-name="T52"/></text:p>
      <text:p text:style-name="P23"><text:span text:style-name="T52"/></text:p>
      <text:p text:style-name="P23"><text:span text:style-name="T52">¿Y que pasa con los viajes por carretera?, ¿Ocurre igual? Imaginemos una red de carretera ficticia como la siguiente:</text:span></text:p>
      <text:p text:style-name="P23"><text:span text:style-name="T52"/></text:p>
      <text:p text:style-name="P23"><text:span text:style-name="T52"/></text:p>
      <text:p text:style-name="P23"><text:span text:style-name="T52"/></text:p>
      <text:p text:style-name="P23"><text:span text:style-name="T52"/></text:p>
      <text:p text:style-name="P23"><text:span text:style-name="T52"/></text:p>
      <text:p text:style-name="P23"><text:span text:style-name="T52"/></text:p>
      <text:p text:style-name="P23"><text:span text:style-name="T52"/></text:p>
      <text:p text:style-name="P23"><text:span text:style-name="T52"/></text:p>
      <text:p text:style-name="P23"><text:span text:style-name="T52"/></text:p>
      <text:p text:style-name="P23"><text:span text:style-name="T52"/></text:p>
      <text:p text:style-name="P23"><text:span text:style-name="T52"/></text:p>
      <text:p text:style-name="P23"><text:span text:style-name="T52"/></text:p>
      <text:p text:style-name="P23"><text:span text:style-name="T52"/></text:p>
      <text:p text:style-name="P23"><text:span text:style-name="T52">¬</text:span></text:p>
      <text:p text:style-name="P23"><text:span text:style-name="T52"/></text:p>
      <text:p text:style-name="P23"><text:span text:style-name="T52"/></text:p>
      <text:p text:style-name="P23"><text:span text:style-name="T52"/></text:p>
      <text:p text:style-name="P23"><text:span text:style-name="T52"/></text:p>
      <text:p text:style-name="P23"><text:span text:style-name="T52"/></text:p>
      <text:p text:style-name="P23"><text:span text:style-name="T52"/></text:p>
      <text:p text:style-name="P23"><text:span text:style-name="T52"/></text:p>
      <text:p text:style-name="P23"><text:span text:style-name="T52"/></text:p>
      <text:p text:style-name="P23"><text:span text:style-name="T52"/></text:p>
      <text:p text:style-name="P23"><text:span text:style-name="T52"/></text:p>
      <text:p text:style-name="P23"><text:span text:style-name="T52">El objetivo es llegar de la Ciudad 1 a la ciudad 5 cubriendo la menor distancia posible. Nuevamente se usa la búsqueda en amplitud, cada paso por una ciudad, supone bajar un nivel en el árbol, por lo que parce que tiene sentido que a menor número de ciudades recorridas, mejor solución. Sin embargo, se observa estas dos soluciones:</text:span></text:p>
      <text:p text:style-name="P23"><text:span text:style-name="T52"/></text:p>
      <text:p text:style-name="P23"><text:span text:style-name="T52">Ciudad 1 -&gt; Ciudad 5 (827 km.)</text:span></text:p>
      <text:p text:style-name="P23"><text:span text:style-name="T52">Ciudad 1 -&gt; Ciudad 4 -&gt; Ciudad 5 (521 km).</text:span></text:p>
      <text:p text:style-name="P23"><text:span text:style-name="T52"/></text:p>
      <text:p text:style-name="P23"><text:span text:style-name="T52">Aplicando la búsqueda en amplitud se hubiese llegado a la primera solución que atraviesa dos ciudades con 827 km, (dos niveles en el árbol). Sin embargo si se hubiese permitido que el algoritmo descendiera un nivel más, hubiera encontrado una solución menor con 521 km, aunque el algoritmo de búsqueda en amplitud no es óptimo.</text:span></text:p>
      <text:p text:style-name="P23"><text:span text:style-name="T52"/></text:p>
      <text:p text:style-name="P23"><text:span text:style-name="T52">En general se puede decir que es óptimo si el costo de la función es un valor no decreciente directamente relacionado con la profundidad dentro del recorrido del árbol.</text:span></text:p>
      <text:p text:style-name="P23"><text:span text:style-name="T52"/></text:p>
      <text:p text:style-name="P23"><text:span text:style-name="T52">A la hora de decidir por un algoritmo u otro, es conveniente conocer su comportamiento en cuanto al tiempo de ejecución y cantidad de memoria necesaria. El tiempo de ejecución necesario depende directamente del numero de nodos generados. Es lo que se le llama Complejidad Temporal. <text:s/>Si el árbol tiene un factor de ramificación b, del nodo raíz saldrán b hijos. En el siguiente nivel se tendrá b2 , y asi sucesivamente, en general para una una profundidad d se tendría:</text:span></text:p>
      <text:p text:style-name="P23"><text:span text:style-name="T52"/></text:p>
      <text:p text:style-name="P23"><text:span text:style-name="T52">Número de nodos = b + b2 + b3 + … + bd</text:span></text:p>
      <text:p text:style-name="P23"><text:span text:style-name="T52"/></text:p>
      <text:p text:style-name="P23"><text:span text:style-name="T52">Generalmente, se utiliza una notación especial para expresar la complejidad de un algoritmo: La cota superior asintótica. Más comúnmente conocida como notación O. sin entrar en detalle se dirá que corresponde con una función que sirve de cota superior de la función que se está analizando cuando el argumento tiende a infinito. Para este caso se dirá que para el algoritmo de búsqueda en amplitud tiene una complejidad temporal O(bd).</text:span></text:p>
      <text:p text:style-name="P23"><text:span text:style-name="T52"/></text:p>
      <text:p text:style-name="P23"><text:span text:style-name="T52">En cuanto al uso de memoria, que se llamará complejidad espacial, <text:s/>la búsqueda en amplitud mantiene en memoria cada uno de los nodos expandidos. Además, al usar dos estructuras de datos se tendrá una complejidad O(bd) para almacenar los nodos frontera y O(bd-1) para nodos visitados.</text:span></text:p>
      <text:p text:style-name="P23"><text:span text:style-name="T52"/></text:p>
      <text:p text:style-name="P11"><text:span text:style-name="T47">La notación O es muy útil para comprar la complejidad de dos algoritmos diferentes.</text:span></text:p>
      <text:p text:style-name="P11"><text:span text:style-name="T47"/></text:p>
      <text:p text:style-name="P11"><text:span text:style-name="T47"/></text:p>
      <text:p text:style-name="P11">antes de seguir avanzando se resolvera el problema de los vuelos usando la busqueda de amplitud<text:s/></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paragraph-properties style:tab-stop-distance="35.450000000000003pt"/>
      <style:text-properties fo:font-size="10.000000000000000pt"/>
    </style:default-style>
    <style:style style:name="Bibliography_20misc" style:display-name="Bibliography misc" style:family="paragraph"/>
    <style:style style:name="Contents_204" style:display-name="Contents 4" style:family="paragraph">
      <style:paragraph-properties fo:margin-left="24.000000000000000pt"/>
    </style:style>
    <style:style style:name="Bibliography_20incollection" style:display-name="Bibliography incollection" style:family="paragraph"/>
    <style:style style:name="Bibliography_20journal" style:display-name="Bibliography journal" style:family="paragraph"/>
    <style:style style:name="Heading_204" style:display-name="Heading 4" style:family="paragraph">
      <style:paragraph-properties fo:margin-bottom="2.000000000000000pt" fo:margin-top="4.000000000000000pt"/>
      <style:text-properties fo:color="#0f4761" fo:font-family="Arial" fo:font-style="italic"/>
    </style:style>
    <style:style style:name="Footnote" style:display-name="Footnote" style:family="paragraph" style:next-style-name=""/>
    <style:style style:name="Heading_202" style:display-name="Heading 2" style:family="paragraph">
      <style:paragraph-properties fo:margin-bottom="4.000000000000000pt" fo:margin-top="8.000000000000000pt"/>
      <style:text-properties fo:color="#0f4761" fo:font-family="Arial" fo:font-size="16.000000000000000pt"/>
    </style:style>
    <style:style style:name="Contents_203" style:display-name="Contents 3" style:family="paragraph">
      <style:paragraph-properties fo:margin-left="16.000000000000000pt"/>
    </style:style>
    <style:style style:name="Bibliography_20www" style:display-name="Bibliography www" style:family="paragraph"/>
    <style:style style:name="Footer" style:display-name="Footer" style:family="paragraph">
      <style:paragraph-properties fo:line-height="100%" fo:margin-bottom="0.000000000000000pt">
        <style:tab-stops>
          <style:tab-stop style:position="242.22089206100pt" style:type="center" style:leader-type="none" style:leader-style="none" style:leader-width="auto" style:leader-color="font-color"/>
          <style:tab-stop style:position="484.44178412200pt" style:type="right" style:leader-type="none" style:leader-style="none" style:leader-width="auto" style:leader-color="font-color"/>
        </style:tab-stops>
      </style:paragraph-properties>
    </style:style>
    <style:style style:name="Subtitle" style:display-name="Subtitle" style:family="paragraph">
      <style:text-properties fo:color="#595959" fo:font-size="14.000000000000000pt" fo:letter-spacing="0.750000000000000pt"/>
    </style:style>
    <style:style style:name="Heading" style:display-name="Heading" style:family="paragraph">
      <style:paragraph-properties fo:margin-bottom="6.000000000000000pt" fo:margin-top="12.000000000000000pt"/>
      <style:text-properties fo:font-family="Liberation Sans" fo:font-size="14.000000000000000pt"/>
    </style:style>
    <style:style style:name="toc_208" style:display-name="toc 8" style:family="paragraph">
      <style:paragraph-properties fo:margin-bottom="5.000000000000000pt" fo:margin-left="77.017456258600006pt"/>
    </style:style>
    <style:style style:name="TOC_20Heading" style:display-name="TOC Heading" style:family="paragraph"/>
    <style:style style:name="Caption" style:display-name="Caption" style:family="paragraph">
      <style:paragraph-properties fo:margin-bottom="6.000000000000000pt" fo:margin-top="6.000000000000000pt"/>
      <style:text-properties fo:font-size="12.000000000000000pt" fo:font-style="italic"/>
    </style:style>
    <style:style style:name="Title" style:display-name="Title" style:family="paragraph">
      <style:paragraph-properties fo:line-height="100%" fo:margin-bottom="4.000000000000000pt"/>
      <style:text-properties fo:font-family="Arial" fo:font-size="28.000000000000000pt" fo:letter-spacing="-0.500000000000000pt"/>
    </style:style>
    <style:style style:name="Bibliography_20custom4" style:display-name="Bibliography custom4" style:family="paragraph"/>
    <style:style style:name="toc_201" style:display-name="toc 1" style:family="paragraph">
      <style:paragraph-properties fo:margin-bottom="5.000000000000000pt"/>
    </style:style>
    <style:style style:name="Heading_201" style:display-name="Heading 1" style:family="paragraph">
      <style:paragraph-properties fo:margin-bottom="4.000000000000000pt" fo:margin-top="18.000000000000000pt"/>
      <style:text-properties fo:color="#0f4761" fo:font-family="Arial" fo:font-size="20.000000000000000pt"/>
    </style:style>
    <style:style style:name="List_20Paragraph" style:display-name="List Paragraph" style:family="paragraph">
      <style:paragraph-properties fo:margin-left="36.000062366000002pt"/>
    </style:style>
    <style:style style:name="toc_203" style:display-name="toc 3" style:family="paragraph">
      <style:paragraph-properties fo:margin-bottom="5.000000000000000pt" fo:margin-left="22.002557801959998pt"/>
    </style:style>
    <style:style style:name="Bibliography_20inbook" style:display-name="Bibliography inbook" style:family="paragraph"/>
    <style:style style:name="Contents_201" style:display-name="Contents 1" style:family="paragraph">
      <style:paragraph-properties fo:margin-left="0.000000000000000pt"/>
    </style:style>
    <style:style style:name="Bibliography_20techreport" style:display-name="Bibliography techreport" style:family="paragraph"/>
    <style:style style:name="footnote_20text" style:display-name="footnote text" style:family="paragraph">
      <style:paragraph-properties fo:line-height="100%" fo:margin-bottom="0.000000000000000pt"/>
      <style:text-properties fo:font-size="10.000000000000000pt"/>
    </style:style>
    <style:style style:name="endnote_20text" style:display-name="endnote text" style:family="paragraph">
      <style:paragraph-properties fo:line-height="100%" fo:margin-bottom="0.000000000000000pt"/>
      <style:text-properties fo:font-size="10.000000000000000pt"/>
    </style:style>
    <style:style style:name="toc_205" style:display-name="toc 5" style:family="paragraph">
      <style:paragraph-properties fo:margin-bottom="5.000000000000000pt" fo:margin-left="43.993777001600002pt"/>
    </style:style>
    <style:style style:name="Table_20Contents" style:display-name="Table Contents" style:family="paragraph"/>
    <style:style style:name="Bibliography_20inproceedings" style:display-name="Bibliography inproceedings" style:family="paragraph"/>
    <style:style style:name="Heading_206" style:display-name="Heading 6" style:family="paragraph">
      <style:paragraph-properties fo:margin-bottom="0.000000000000000pt" fo:margin-top="2.000000000000000pt"/>
      <style:text-properties fo:color="#595959" fo:font-family="Arial" fo:font-style="italic"/>
    </style:style>
    <style:style style:name="Bibliography_20manual" style:display-name="Bibliography manual" style:family="paragraph"/>
    <style:style style:name="toc_202" style:display-name="toc 2" style:family="paragraph">
      <style:paragraph-properties fo:margin-bottom="5.000000000000000pt" fo:margin-left="11.001278900979999pt"/>
    </style:style>
    <style:style style:name="Bibliography_20book" style:display-name="Bibliography book" style:family="paragraph"/>
    <style:style style:name="Bibliography_20unpublished" style:display-name="Bibliography unpublished" style:family="paragraph"/>
    <style:style style:name="List" style:display-name="List" style:family="paragraph"/>
    <style:style style:name="Index" style:display-name="Index" style:family="paragraph"/>
    <style:style style:name="Contents_206" style:display-name="Contents 6" style:family="paragraph">
      <style:paragraph-properties fo:margin-left="40.000000000000000pt"/>
    </style:style>
    <style:style style:name="Bibliography_20booklet" style:display-name="Bibliography booklet" style:family="paragraph"/>
    <style:style style:name="Normal" style:display-name="Normal" style:family="paragraph"/>
    <style:style style:name="Bibliography_20custom5" style:display-name="Bibliography custom5" style:family="paragraph"/>
    <style:style style:name="No_20Spacing" style:display-name="No Spacing" style:family="paragraph">
      <style:paragraph-properties fo:line-height="100%" fo:margin-bottom="0.000000000000000pt"/>
    </style:style>
    <style:style style:name="Contents_202" style:display-name="Contents 2" style:family="paragraph">
      <style:paragraph-properties fo:margin-left="8.000000000000000pt"/>
    </style:style>
    <style:style style:name="toc_207" style:display-name="toc 7" style:family="paragraph">
      <style:paragraph-properties fo:margin-bottom="5.000000000000000pt" fo:margin-left="65.990665502399992pt"/>
    </style:style>
    <style:style style:name="Bibliography_20conference" style:display-name="Bibliography conference" style:family="paragraph"/>
    <style:style style:name="table_20of_20figures" style:display-name="table of figures" style:family="paragraph">
      <style:paragraph-properties fo:margin-bottom="0.000000000000000pt"/>
    </style:style>
    <style:style style:name="Header" style:display-name="Header" style:family="paragraph">
      <style:paragraph-properties fo:line-height="100%" fo:margin-bottom="0.000000000000000pt">
        <style:tab-stops>
          <style:tab-stop style:position="242.22089206100pt" style:type="center" style:leader-type="none" style:leader-style="none" style:leader-width="auto" style:leader-color="font-color"/>
          <style:tab-stop style:position="484.44178412200pt" style:type="right" style:leader-type="none" style:leader-style="none" style:leader-width="auto" style:leader-color="font-color"/>
        </style:tab-stops>
      </style:paragraph-properties>
    </style:style>
    <style:style style:name="Contents_205" style:display-name="Contents 5" style:family="paragraph">
      <style:paragraph-properties fo:margin-left="32.000000000000000pt"/>
    </style:style>
    <style:style style:name="Standard" style:display-name="Standard" style:family="paragraph"/>
    <style:style style:name="Contents_2010" style:display-name="Contents 10" style:family="paragraph">
      <style:paragraph-properties fo:margin-left="72.000000000000000pt"/>
    </style:style>
    <style:style style:name="Contents_207" style:display-name="Contents 7" style:family="paragraph">
      <style:paragraph-properties fo:margin-left="48.000000000000000pt"/>
    </style:style>
    <style:style style:name="Heading_207" style:display-name="Heading 7" style:family="paragraph">
      <style:paragraph-properties fo:margin-bottom="0.000000000000000pt" fo:margin-top="2.000000000000000pt"/>
      <style:text-properties fo:color="#595959" fo:font-family="Arial"/>
    </style:style>
    <style:style style:name="Heading_203" style:display-name="Heading 3" style:family="paragraph">
      <style:paragraph-properties fo:margin-bottom="4.000000000000000pt" fo:margin-top="8.000000000000000pt"/>
      <style:text-properties fo:color="#0f4761" fo:font-family="Arial" fo:font-size="14.000000000000000pt"/>
    </style:style>
    <style:style style:name="Bibliography_20mastersthesis" style:display-name="Bibliography mastersthesis" style:family="paragraph"/>
    <style:style style:name="toc_204" style:display-name="toc 4" style:family="paragraph">
      <style:paragraph-properties fo:margin-bottom="5.000000000000000pt" fo:margin-left="32.995332751199996pt"/>
    </style:style>
    <style:style style:name="Bibliography_20article" style:display-name="Bibliography article" style:family="paragraph"/>
    <style:style style:name="Bibliography_20custom3" style:display-name="Bibliography custom3" style:family="paragraph"/>
    <style:style style:name="Intense_20Quote" style:display-name="Intense Quote" style:family="paragraph">
      <style:paragraph-properties fo:border-bottom="0.500032pt solid #0f4761" fo:border-top="0.500032pt solid #0f4761" fo:margin-bottom="18.000000000000000pt" fo:margin-left="43.200074839199999pt" fo:margin-right="43.200074839199999pt" fo:margin-top="18.000000000000000pt" fo:text-align="center"/>
      <style:text-properties fo:color="#0f4761" fo:font-style="italic"/>
    </style:style>
    <style:style style:name="Bibliography_20custom2" style:display-name="Bibliography custom2" style:family="paragraph"/>
    <style:style style:name="Bibliography_20custom1" style:display-name="Bibliography custom1" style:family="paragraph"/>
    <style:style style:name="toc_206" style:display-name="toc 6" style:family="paragraph">
      <style:paragraph-properties fo:margin-bottom="5.000000000000000pt" fo:margin-left="54.992221252000000pt"/>
    </style:style>
    <style:style style:name="Contents_208" style:display-name="Contents 8" style:family="paragraph">
      <style:paragraph-properties fo:margin-left="56.000000000000000pt"/>
    </style:style>
    <style:style style:name="Bibliography_20phdthesis" style:display-name="Bibliography phdthesis" style:family="paragraph"/>
    <style:style style:name="Quote" style:display-name="Quote" style:family="paragraph">
      <style:paragraph-properties fo:margin-top="8.000000000000000pt" fo:text-align="center"/>
      <style:text-properties fo:color="#404040" fo:font-style="italic"/>
    </style:style>
    <style:style style:name="Bibliography_20email" style:display-name="Bibliography email" style:family="paragraph"/>
    <style:style style:name="Endnote" style:display-name="Endnote" style:family="paragraph" style:next-style-name=""/>
    <style:style style:name="Text_20body" style:display-name="Text body" style:family="paragraph">
      <style:paragraph-properties fo:line-height="115%" fo:margin-bottom="7.000000000000000pt" fo:margin-top="0.000000000000000pt"/>
    </style:style>
    <style:style style:name="toc_209" style:display-name="toc 9" style:family="paragraph">
      <style:paragraph-properties fo:margin-bottom="5.000000000000000pt" fo:margin-left="88.015900508999991pt"/>
    </style:style>
    <style:style style:name="Heading_208" style:display-name="Heading 8" style:family="paragraph">
      <style:paragraph-properties fo:margin-bottom="0.000000000000000pt"/>
      <style:text-properties fo:color="#272727" fo:font-family="Arial" fo:font-style="italic"/>
    </style:style>
    <style:style style:name="Contents_209" style:display-name="Contents 9" style:family="paragraph">
      <style:paragraph-properties fo:margin-left="64.000000000000000pt"/>
    </style:style>
    <style:style style:name="DStyle_paragraph" style:display-name="DStyle_paragraph" style:family="paragraph">
      <style:text-properties fo:color="#000000" fo:country="MX" fo:font-family="Liberation Serif" fo:font-size="12.000000000000000pt" fo:language="es"/>
    </style:style>
    <style:style style:name="Table_20Heading" style:display-name="Table Heading" style:family="paragraph">
      <style:paragraph-properties fo:text-align="center"/>
      <style:text-properties fo:font-weight="bold"/>
    </style:style>
    <style:style style:name="Heading_205" style:display-name="Heading 5" style:family="paragraph">
      <style:paragraph-properties fo:margin-bottom="2.000000000000000pt" fo:margin-top="4.000000000000000pt"/>
      <style:text-properties fo:color="#0f4761" fo:font-family="Arial"/>
    </style:style>
    <style:style style:name="Heading_209" style:display-name="Heading 9" style:family="paragraph">
      <style:paragraph-properties fo:margin-bottom="0.000000000000000pt"/>
      <style:text-properties fo:color="#272727" fo:font-family="Arial" fo:font-style="italic"/>
    </style:style>
    <style:style style:name="Bibliography_20proceedings" style:display-name="Bibliography proceedings" style:family="paragraph"/>
    <style:style style:name="T35" style:display-name="T35" style:family="text"/>
    <style:style style:name="Heading_207_20Char" style:display-name="Heading 7 Char" style:family="text">
      <style:text-properties fo:color="#595959" fo:font-family="Arial"/>
    </style:style>
    <style:style style:name="T27" style:display-name="T27" style:family="text"/>
    <style:style style:name="Heading_209_20Char" style:display-name="Heading 9 Char" style:family="text">
      <style:text-properties fo:color="#272727" fo:font-family="Arial" fo:font-style="italic"/>
    </style:style>
    <style:style style:name="Strong" style:display-name="Strong" style:family="text">
      <style:text-properties fo:font-weight="bold"/>
    </style:style>
    <style:style style:name="Header_20Char" style:display-name="Header Char" style:family="text"/>
    <style:style style:name="Endnote_20Text_20Char" style:display-name="Endnote Text Char" style:family="text">
      <style:text-properties fo:font-size="10.000000000000000pt"/>
    </style:style>
    <style:style style:name="T20" style:display-name="T20" style:family="text"/>
    <style:style style:name="Heading_201_20Char" style:display-name="Heading 1 Char" style:family="text">
      <style:text-properties fo:color="#0f4761" fo:font-family="Arial" fo:font-size="20.000000000000000pt"/>
    </style:style>
    <style:style style:name="T32" style:display-name="T32" style:family="text"/>
    <style:style style:name="T33" style:display-name="T33" style:family="text"/>
    <style:style style:name="T36" style:display-name="T36" style:family="text"/>
    <style:style style:name="T34" style:display-name="T34" style:family="text"/>
    <style:style style:name="Emphasis" style:display-name="Emphasis" style:family="text">
      <style:text-properties fo:font-style="italic"/>
    </style:style>
    <style:style style:name="T13" style:display-name="T13" style:family="text"/>
    <style:style style:name="Book_20Title" style:display-name="Book Title" style:family="text">
      <style:text-properties fo:font-style="italic" fo:font-weight="bold" fo:letter-spacing="0.250000000000000pt"/>
    </style:style>
    <style:style style:name="T7" style:display-name="T7" style:family="text"/>
    <style:style style:name="Endnote_20Symbol" style:display-name="Endnote Symbol" style:family="text"/>
    <style:style style:name="Subtitle_20Char" style:display-name="Subtitle Char" style:family="text">
      <style:text-properties fo:color="#595959" fo:font-size="14.000000000000000pt" fo:letter-spacing="0.750000000000000pt"/>
    </style:style>
    <style:style style:name="Footer_20Char" style:display-name="Footer Char" style:family="text"/>
    <style:style style:name="Heading_205_20Char" style:display-name="Heading 5 Char" style:family="text">
      <style:text-properties fo:color="#0f4761" fo:font-family="Arial"/>
    </style:style>
    <style:style style:name="T15" style:display-name="T15" style:family="text"/>
    <style:style style:name="Numbering_20Symbols" style:display-name="Numbering Symbols" style:family="text"/>
    <style:style style:name="T25" style:display-name="T25" style:family="text"/>
    <style:style style:name="Footnote_20Text_20Char" style:display-name="Footnote Text Char" style:family="text">
      <style:text-properties fo:font-size="10.000000000000000pt"/>
    </style:style>
    <style:style style:name="Quote_20Char" style:display-name="Quote Char" style:family="text">
      <style:text-properties fo:color="#404040" fo:font-style="italic"/>
    </style:style>
    <style:style style:name="Footnote_20anchor" style:display-name="Footnote anchor" style:family="text">
      <style:text-properties style:text-position="super"/>
    </style:style>
    <style:style style:name="T29" style:display-name="T29" style:family="text"/>
    <style:style style:name="Subtle_20Emphasis" style:display-name="Subtle Emphasis" style:family="text">
      <style:text-properties fo:color="#404040" fo:font-style="italic"/>
    </style:style>
    <style:style style:name="T22" style:display-name="T22" style:family="text"/>
    <style:style style:name="T1" style:display-name="T1" style:family="text"/>
    <style:style style:name="T19" style:display-name="T19" style:family="text"/>
    <style:style style:name="T5" style:display-name="T5" style:family="text"/>
    <style:style style:name="T30" style:display-name="T30" style:family="text"/>
    <style:style style:name="Endnote_20anchor" style:display-name="Endnote anchor" style:family="text">
      <style:text-properties style:text-position="super"/>
    </style:style>
    <style:style style:name="T17" style:display-name="T17" style:family="text"/>
    <style:style style:name="Hyperlink" style:display-name="Hyperlink" style:family="text">
      <style:text-properties fo:color="#0563c1" style:text-underline-color="font-color" style:text-underline-style="solid" style:text-underline-type="single" style:text-underline-width="auto"/>
    </style:style>
    <style:style style:name="Intense_20Quote_20Char" style:display-name="Intense Quote Char" style:family="text">
      <style:text-properties fo:color="#0f4761" fo:font-style="italic"/>
    </style:style>
    <style:style style:name="T28" style:display-name="T28" style:family="text"/>
    <style:style style:name="T14" style:display-name="T14" style:family="text"/>
    <style:style style:name="Heading_208_20Char" style:display-name="Heading 8 Char" style:family="text">
      <style:text-properties fo:color="#272727" fo:font-family="Arial" fo:font-style="italic"/>
    </style:style>
    <style:style style:name="T21" style:display-name="T21" style:family="text"/>
    <style:style style:name="T12" style:display-name="T12" style:family="text"/>
    <style:style style:name="Bullet_20Symbols" style:display-name="Bullet Symbols" style:family="text">
      <style:text-properties fo:font-family="OpenSymbol"/>
    </style:style>
    <style:style style:name="Heading_204_20Char" style:display-name="Heading 4 Char" style:family="text">
      <style:text-properties fo:color="#0f4761" fo:font-family="Arial" fo:font-style="italic"/>
    </style:style>
    <style:style style:name="T6" style:display-name="T6" style:family="text"/>
    <style:style style:name="T9" style:display-name="T9" style:family="text"/>
    <style:style style:name="T11" style:display-name="T11" style:family="text"/>
    <style:style style:name="Internet_20link" style:display-name="Internet link" style:family="text">
      <style:text-properties fo:color="#0563c1" style:text-underline-color="font-color" style:text-underline-style="solid" style:text-underline-type="single" style:text-underline-width="auto"/>
    </style:style>
    <style:style style:name="T23" style:display-name="T23" style:family="text"/>
    <style:style style:name="T3" style:display-name="T3" style:family="text"/>
    <style:style style:name="FollowedHyperlink" style:display-name="FollowedHyperlink" style:family="text">
      <style:text-properties fo:color="#954f72" style:text-underline-color="font-color" style:text-underline-style="solid" style:text-underline-type="single" style:text-underline-width="auto"/>
    </style:style>
    <style:style style:name="Subtle_20Reference" style:display-name="Subtle Reference" style:family="text">
      <style:text-properties fo:color="#5a5a5a" fo:font-variant="small-caps"/>
    </style:style>
    <style:style style:name="footnote_20reference" style:display-name="footnote reference" style:family="text">
      <style:text-properties style:text-position="super"/>
    </style:style>
    <style:style style:name="Default_20Paragraph_20Font" style:display-name="Default Paragraph Font" style:family="text"/>
    <style:style style:name="Title_20Char" style:display-name="Title Char" style:family="text">
      <style:text-properties fo:font-family="Arial" fo:font-size="28.000000000000000pt" fo:letter-spacing="-0.500000000000000pt"/>
    </style:style>
    <style:style style:name="endnote_20reference" style:display-name="endnote reference" style:family="text">
      <style:text-properties style:text-position="super"/>
    </style:style>
    <style:style style:name="T16" style:display-name="T16" style:family="text"/>
    <style:style style:name="T4" style:display-name="T4" style:family="text"/>
    <style:style style:name="Footnote_20Symbol" style:display-name="Footnote Symbol" style:family="text"/>
    <style:style style:name="T18" style:display-name="T18" style:family="text"/>
    <style:style style:name="T26" style:display-name="T26" style:family="text"/>
    <style:style style:name="T10" style:display-name="T10" style:family="text"/>
    <style:style style:name="Intense_20Emphasis" style:display-name="Intense Emphasis" style:family="text">
      <style:text-properties fo:color="#0f4761" fo:font-style="italic"/>
    </style:style>
    <style:style style:name="Heading_202_20Char" style:display-name="Heading 2 Char" style:family="text">
      <style:text-properties fo:color="#0f4761" fo:font-family="Arial" fo:font-size="16.000000000000000pt"/>
    </style:style>
    <style:style style:name="T24" style:display-name="T24" style:family="text"/>
    <style:style style:name="Heading_203_20Char" style:display-name="Heading 3 Char" style:family="text">
      <style:text-properties fo:color="#0f4761" fo:font-family="Arial" fo:font-size="14.000000000000000pt"/>
    </style:style>
    <style:style style:name="T2" style:display-name="T2" style:family="text"/>
    <style:style style:name="T8" style:display-name="T8" style:family="text"/>
    <style:style style:name="Intense_20Reference" style:display-name="Intense Reference" style:family="text">
      <style:text-properties fo:color="#0f4761" fo:font-variant="small-caps" fo:font-weight="bold" fo:letter-spacing="0.250000000000000pt"/>
    </style:style>
    <style:style style:name="Placeholder_20Text" style:display-name="Placeholder Text" style:family="text">
      <style:text-properties fo:color="#666666"/>
    </style:style>
    <style:style style:name="T31" style:display-name="T31" style:family="text"/>
    <style:style style:name="Heading_206_20Char" style:display-name="Heading 6 Char" style:family="text">
      <style:text-properties fo:color="#595959" fo:font-family="Arial" fo:font-style="italic"/>
    </style:style>
    <text:list-style style:name="WWNum2" style:display-name="WWNum2">
      <text:list-level-style-number text:start-value="1" text:display-levels="1" style:num-suffix="." style:num-format="1" text:style-name="T10" text:level="1">
        <style:list-level-properties text:list-level-position-and-space-mode="label-alignment" fo:text-align="start">
          <style:list-level-label-alignment text:label-followed-by="space" fo:text-indent="-18.00003118300pt" fo:margin-left="36.00006236600pt"/>
        </style:list-level-properties>
      </text:list-level-style-number>
      <text:list-level-style-number text:start-value="1" text:display-levels="1" style:num-suffix="." style:num-format="1" text:style-name="T11" text:level="2">
        <style:list-level-properties text:list-level-position-and-space-mode="label-alignment" fo:text-align="start">
          <style:list-level-label-alignment text:label-followed-by="space" fo:text-indent="-18.00003118300pt" fo:margin-left="54.00009354900pt"/>
        </style:list-level-properties>
      </text:list-level-style-number>
      <text:list-level-style-number text:start-value="1" text:display-levels="1" style:num-suffix="." style:num-format="1" text:style-name="T12" text:level="3">
        <style:list-level-properties text:list-level-position-and-space-mode="label-alignment" fo:text-align="start">
          <style:list-level-label-alignment text:label-followed-by="space" fo:text-indent="-18.00003118300pt" fo:margin-left="72.00012473200pt"/>
        </style:list-level-properties>
      </text:list-level-style-number>
      <text:list-level-style-number text:start-value="1" text:display-levels="1" style:num-suffix="." style:num-format="1" text:style-name="T13" text:level="4">
        <style:list-level-properties text:list-level-position-and-space-mode="label-alignment" fo:text-align="start">
          <style:list-level-label-alignment text:label-followed-by="space" fo:text-indent="-18.00003118300pt" fo:margin-left="90.00015591500pt"/>
        </style:list-level-properties>
      </text:list-level-style-number>
      <text:list-level-style-number text:start-value="1" text:display-levels="1" style:num-suffix="." style:num-format="1" text:style-name="T14" text:level="5">
        <style:list-level-properties text:list-level-position-and-space-mode="label-alignment" fo:text-align="start">
          <style:list-level-label-alignment text:label-followed-by="space" fo:text-indent="-18.00003118300pt" fo:margin-left="108.00018709800pt"/>
        </style:list-level-properties>
      </text:list-level-style-number>
      <text:list-level-style-number text:start-value="1" text:display-levels="1" style:num-suffix="." style:num-format="1" text:style-name="T15" text:level="6">
        <style:list-level-properties text:list-level-position-and-space-mode="label-alignment" fo:text-align="start">
          <style:list-level-label-alignment text:label-followed-by="space" fo:text-indent="-18.00003118300pt" fo:margin-left="126.00021828100pt"/>
        </style:list-level-properties>
      </text:list-level-style-number>
      <text:list-level-style-number text:start-value="1" text:display-levels="1" style:num-suffix="." style:num-format="1" text:style-name="T16" text:level="7">
        <style:list-level-properties text:list-level-position-and-space-mode="label-alignment" fo:text-align="start">
          <style:list-level-label-alignment text:label-followed-by="space" fo:text-indent="-18.00003118300pt" fo:margin-left="144.00024946400pt"/>
        </style:list-level-properties>
      </text:list-level-style-number>
      <text:list-level-style-number text:start-value="1" text:display-levels="1" style:num-suffix="." style:num-format="1" text:style-name="T17" text:level="8">
        <style:list-level-properties text:list-level-position-and-space-mode="label-alignment" fo:text-align="start">
          <style:list-level-label-alignment text:label-followed-by="space" fo:text-indent="-18.00003118300pt" fo:margin-left="162.00028064700pt"/>
        </style:list-level-properties>
      </text:list-level-style-number>
      <text:list-level-style-number text:start-value="1" text:display-levels="1" style:num-suffix="." style:num-format="1" text:style-name="T18" text:level="9">
        <style:list-level-properties text:list-level-position-and-space-mode="label-alignment" fo:text-align="start">
          <style:list-level-label-alignment text:label-followed-by="space" fo:text-indent="-18.00003118300pt" fo:margin-left="180.00031183000pt"/>
        </style:list-level-properties>
      </text:list-level-style-number>
    </text:list-style>
    <text:list-style style:name="WWNum3" style:display-name="WWNum3">
      <text:list-level-style-bullet text:bullet-char="•" text:style-name="T19" text:level="1">
        <style:list-level-properties text:list-level-position-and-space-mode="label-alignment" fo:text-align="start">
          <style:list-level-label-alignment text:label-followed-by="space" fo:text-indent="-18.00003118300pt" fo:margin-left="36.00006236600pt"/>
        </style:list-level-properties>
      </text:list-level-style-bullet>
      <text:list-level-style-bullet text:bullet-char="◦" text:style-name="T20" text:level="2">
        <style:list-level-properties text:list-level-position-and-space-mode="label-alignment" fo:text-align="start">
          <style:list-level-label-alignment text:label-followed-by="space" fo:text-indent="-18.00003118300pt" fo:margin-left="54.00009354900pt"/>
        </style:list-level-properties>
      </text:list-level-style-bullet>
      <text:list-level-style-bullet text:bullet-char="▪" text:style-name="T21" text:level="3">
        <style:list-level-properties text:list-level-position-and-space-mode="label-alignment" fo:text-align="start">
          <style:list-level-label-alignment text:label-followed-by="space" fo:text-indent="-18.00003118300pt" fo:margin-left="72.00012473200pt"/>
        </style:list-level-properties>
      </text:list-level-style-bullet>
      <text:list-level-style-bullet text:bullet-char="•" text:style-name="T22" text:level="4">
        <style:list-level-properties text:list-level-position-and-space-mode="label-alignment" fo:text-align="start">
          <style:list-level-label-alignment text:label-followed-by="space" fo:text-indent="-18.00003118300pt" fo:margin-left="90.00015591500pt"/>
        </style:list-level-properties>
      </text:list-level-style-bullet>
      <text:list-level-style-bullet text:bullet-char="◦" text:style-name="T23" text:level="5">
        <style:list-level-properties text:list-level-position-and-space-mode="label-alignment" fo:text-align="start">
          <style:list-level-label-alignment text:label-followed-by="space" fo:text-indent="-18.00003118300pt" fo:margin-left="108.00018709800pt"/>
        </style:list-level-properties>
      </text:list-level-style-bullet>
      <text:list-level-style-bullet text:bullet-char="▪" text:style-name="T24" text:level="6">
        <style:list-level-properties text:list-level-position-and-space-mode="label-alignment" fo:text-align="start">
          <style:list-level-label-alignment text:label-followed-by="space" fo:text-indent="-18.00003118300pt" fo:margin-left="126.00021828100pt"/>
        </style:list-level-properties>
      </text:list-level-style-bullet>
      <text:list-level-style-bullet text:bullet-char="•" text:style-name="T25" text:level="7">
        <style:list-level-properties text:list-level-position-and-space-mode="label-alignment" fo:text-align="start">
          <style:list-level-label-alignment text:label-followed-by="space" fo:text-indent="-18.00003118300pt" fo:margin-left="144.00024946400pt"/>
        </style:list-level-properties>
      </text:list-level-style-bullet>
      <text:list-level-style-bullet text:bullet-char="◦" text:style-name="T26" text:level="8">
        <style:list-level-properties text:list-level-position-and-space-mode="label-alignment" fo:text-align="start">
          <style:list-level-label-alignment text:label-followed-by="space" fo:text-indent="-18.00003118300pt" fo:margin-left="162.00028064700pt"/>
        </style:list-level-properties>
      </text:list-level-style-bullet>
      <text:list-level-style-bullet text:bullet-char="▪" text:style-name="T27" text:level="9">
        <style:list-level-properties text:list-level-position-and-space-mode="label-alignment" fo:text-align="start">
          <style:list-level-label-alignment text:label-followed-by="space" fo:text-indent="-18.00003118300pt" fo:margin-left="180.00031183000pt"/>
        </style:list-level-properties>
      </text:list-level-style-bullet>
    </text:list-style>
    <text:list-style style:name="WWNum1" style:display-name="WWNum1">
      <text:list-level-style-bullet text:bullet-char="•" text:style-name="T1" text:level="1">
        <style:list-level-properties text:list-level-position-and-space-mode="label-alignment" fo:text-align="start">
          <style:list-level-label-alignment text:label-followed-by="space" fo:text-indent="-18.00003118300pt" fo:margin-left="36.00006236600pt"/>
        </style:list-level-properties>
      </text:list-level-style-bullet>
      <text:list-level-style-bullet text:bullet-char="◦" text:style-name="T2" text:level="2">
        <style:list-level-properties text:list-level-position-and-space-mode="label-alignment" fo:text-align="start">
          <style:list-level-label-alignment text:label-followed-by="space" fo:text-indent="-18.00003118300pt" fo:margin-left="54.00009354900pt"/>
        </style:list-level-properties>
      </text:list-level-style-bullet>
      <text:list-level-style-bullet text:bullet-char="▪" text:style-name="T3" text:level="3">
        <style:list-level-properties text:list-level-position-and-space-mode="label-alignment" fo:text-align="start">
          <style:list-level-label-alignment text:label-followed-by="space" fo:text-indent="-18.00003118300pt" fo:margin-left="72.00012473200pt"/>
        </style:list-level-properties>
      </text:list-level-style-bullet>
      <text:list-level-style-bullet text:bullet-char="•" text:style-name="T4" text:level="4">
        <style:list-level-properties text:list-level-position-and-space-mode="label-alignment" fo:text-align="start">
          <style:list-level-label-alignment text:label-followed-by="space" fo:text-indent="-18.00003118300pt" fo:margin-left="90.00015591500pt"/>
        </style:list-level-properties>
      </text:list-level-style-bullet>
      <text:list-level-style-bullet text:bullet-char="◦" text:style-name="T5" text:level="5">
        <style:list-level-properties text:list-level-position-and-space-mode="label-alignment" fo:text-align="start">
          <style:list-level-label-alignment text:label-followed-by="space" fo:text-indent="-18.00003118300pt" fo:margin-left="108.00018709800pt"/>
        </style:list-level-properties>
      </text:list-level-style-bullet>
      <text:list-level-style-bullet text:bullet-char="▪" text:style-name="T6" text:level="6">
        <style:list-level-properties text:list-level-position-and-space-mode="label-alignment" fo:text-align="start">
          <style:list-level-label-alignment text:label-followed-by="space" fo:text-indent="-18.00003118300pt" fo:margin-left="126.00021828100pt"/>
        </style:list-level-properties>
      </text:list-level-style-bullet>
      <text:list-level-style-bullet text:bullet-char="•" text:style-name="T7" text:level="7">
        <style:list-level-properties text:list-level-position-and-space-mode="label-alignment" fo:text-align="start">
          <style:list-level-label-alignment text:label-followed-by="space" fo:text-indent="-18.00003118300pt" fo:margin-left="144.00024946400pt"/>
        </style:list-level-properties>
      </text:list-level-style-bullet>
      <text:list-level-style-bullet text:bullet-char="◦" text:style-name="T8" text:level="8">
        <style:list-level-properties text:list-level-position-and-space-mode="label-alignment" fo:text-align="start">
          <style:list-level-label-alignment text:label-followed-by="space" fo:text-indent="-18.00003118300pt" fo:margin-left="162.00028064700pt"/>
        </style:list-level-properties>
      </text:list-level-style-bullet>
      <text:list-level-style-bullet text:bullet-char="▪" text:style-name="T9" text:level="9">
        <style:list-level-properties text:list-level-position-and-space-mode="label-alignment" fo:text-align="start">
          <style:list-level-label-alignment text:label-followed-by="space" fo:text-indent="-18.00003118300pt" fo:margin-left="180.00031183000pt"/>
        </style:list-level-properties>
      </text:list-level-style-bullet>
    </text:list-style>
    <text:list-style style:name="WWNum4" style:display-name="WWNum4">
      <text:list-level-style-bullet text:bullet-char="" text:style-name="T28" text:level="1">
        <style:list-level-properties text:list-level-position-and-space-mode="label-alignment" fo:text-align="start">
          <style:list-level-label-alignment text:label-followed-by="space" fo:text-indent="0.00000000000pt" fo:margin-left="0.00000000000pt"/>
        </style:list-level-properties>
      </text:list-level-style-bullet>
      <text:list-level-style-bullet text:bullet-char="" text:style-name="T29" text:level="2">
        <style:list-level-properties text:list-level-position-and-space-mode="label-alignment" fo:text-align="start">
          <style:list-level-label-alignment text:label-followed-by="space" fo:text-indent="0.00000000000pt" fo:margin-left="0.00000000000pt"/>
        </style:list-level-properties>
      </text:list-level-style-bullet>
      <text:list-level-style-bullet text:bullet-char="" text:style-name="T30" text:level="3">
        <style:list-level-properties text:list-level-position-and-space-mode="label-alignment" fo:text-align="start">
          <style:list-level-label-alignment text:label-followed-by="space" fo:text-indent="0.00000000000pt" fo:margin-left="0.00000000000pt"/>
        </style:list-level-properties>
      </text:list-level-style-bullet>
      <text:list-level-style-bullet text:bullet-char="" text:style-name="T31" text:level="4">
        <style:list-level-properties text:list-level-position-and-space-mode="label-alignment" fo:text-align="start">
          <style:list-level-label-alignment text:label-followed-by="space" fo:text-indent="0.00000000000pt" fo:margin-left="0.00000000000pt"/>
        </style:list-level-properties>
      </text:list-level-style-bullet>
      <text:list-level-style-bullet text:bullet-char="" text:style-name="T32" text:level="5">
        <style:list-level-properties text:list-level-position-and-space-mode="label-alignment" fo:text-align="start">
          <style:list-level-label-alignment text:label-followed-by="space" fo:text-indent="0.00000000000pt" fo:margin-left="0.00000000000pt"/>
        </style:list-level-properties>
      </text:list-level-style-bullet>
      <text:list-level-style-bullet text:bullet-char="" text:style-name="T33" text:level="6">
        <style:list-level-properties text:list-level-position-and-space-mode="label-alignment" fo:text-align="start">
          <style:list-level-label-alignment text:label-followed-by="space" fo:text-indent="0.00000000000pt" fo:margin-left="0.00000000000pt"/>
        </style:list-level-properties>
      </text:list-level-style-bullet>
      <text:list-level-style-bullet text:bullet-char="" text:style-name="T34" text:level="7">
        <style:list-level-properties text:list-level-position-and-space-mode="label-alignment" fo:text-align="start">
          <style:list-level-label-alignment text:label-followed-by="space" fo:text-indent="0.00000000000pt" fo:margin-left="0.00000000000pt"/>
        </style:list-level-properties>
      </text:list-level-style-bullet>
      <text:list-level-style-bullet text:bullet-char="" text:style-name="T35" text:level="8">
        <style:list-level-properties text:list-level-position-and-space-mode="label-alignment" fo:text-align="start">
          <style:list-level-label-alignment text:label-followed-by="space" fo:text-indent="0.00000000000pt" fo:margin-left="0.00000000000pt"/>
        </style:list-level-properties>
      </text:list-level-style-bullet>
      <text:list-level-style-bullet text:bullet-char="" text:style-name="T36" text:level="9">
        <style:list-level-properties text:list-level-position-and-space-mode="label-alignment" fo:text-align="start">
          <style:list-level-label-alignment text:label-followed-by="space" fo:text-indent="0.00000000000pt" fo:margin-left="0.00000000000pt"/>
        </style:list-level-properties>
      </text:list-level-style-bullet>
    </text:list-style>
    <text:list-style style:name="WWNum21" style:display-name="WWNum2">
      <text:list-level-style-number text:start-value="1" text:display-levels="1" style:num-suffix="." style:num-format="1" text:style-name="T10" text:level="1">
        <style:list-level-properties text:list-level-position-and-space-mode="label-alignment" fo:text-align="start">
          <style:list-level-label-alignment text:label-followed-by="space" fo:text-indent="-18.00003118300pt" fo:margin-left="36.00006236600pt"/>
        </style:list-level-properties>
      </text:list-level-style-number>
      <text:list-level-style-number text:start-value="1" text:display-levels="1" style:num-suffix="." style:num-format="1" text:style-name="T11" text:level="2">
        <style:list-level-properties text:list-level-position-and-space-mode="label-alignment" fo:text-align="start">
          <style:list-level-label-alignment text:label-followed-by="space" fo:text-indent="-18.00003118300pt" fo:margin-left="54.00009354900pt"/>
        </style:list-level-properties>
      </text:list-level-style-number>
      <text:list-level-style-number text:start-value="1" text:display-levels="1" style:num-suffix="." style:num-format="1" text:style-name="T12" text:level="3">
        <style:list-level-properties text:list-level-position-and-space-mode="label-alignment" fo:text-align="start">
          <style:list-level-label-alignment text:label-followed-by="space" fo:text-indent="-18.00003118300pt" fo:margin-left="72.00012473200pt"/>
        </style:list-level-properties>
      </text:list-level-style-number>
      <text:list-level-style-number text:start-value="1" text:display-levels="1" style:num-suffix="." style:num-format="1" text:style-name="T13" text:level="4">
        <style:list-level-properties text:list-level-position-and-space-mode="label-alignment" fo:text-align="start">
          <style:list-level-label-alignment text:label-followed-by="space" fo:text-indent="-18.00003118300pt" fo:margin-left="90.00015591500pt"/>
        </style:list-level-properties>
      </text:list-level-style-number>
      <text:list-level-style-number text:start-value="1" text:display-levels="1" style:num-suffix="." style:num-format="1" text:style-name="T14" text:level="5">
        <style:list-level-properties text:list-level-position-and-space-mode="label-alignment" fo:text-align="start">
          <style:list-level-label-alignment text:label-followed-by="space" fo:text-indent="-18.00003118300pt" fo:margin-left="108.00018709800pt"/>
        </style:list-level-properties>
      </text:list-level-style-number>
      <text:list-level-style-number text:start-value="1" text:display-levels="1" style:num-suffix="." style:num-format="1" text:style-name="T15" text:level="6">
        <style:list-level-properties text:list-level-position-and-space-mode="label-alignment" fo:text-align="start">
          <style:list-level-label-alignment text:label-followed-by="space" fo:text-indent="-18.00003118300pt" fo:margin-left="126.00021828100pt"/>
        </style:list-level-properties>
      </text:list-level-style-number>
      <text:list-level-style-number text:start-value="1" text:display-levels="1" style:num-suffix="." style:num-format="1" text:style-name="T16" text:level="7">
        <style:list-level-properties text:list-level-position-and-space-mode="label-alignment" fo:text-align="start">
          <style:list-level-label-alignment text:label-followed-by="space" fo:text-indent="-18.00003118300pt" fo:margin-left="144.00024946400pt"/>
        </style:list-level-properties>
      </text:list-level-style-number>
      <text:list-level-style-number text:start-value="1" text:display-levels="1" style:num-suffix="." style:num-format="1" text:style-name="T17" text:level="8">
        <style:list-level-properties text:list-level-position-and-space-mode="label-alignment" fo:text-align="start">
          <style:list-level-label-alignment text:label-followed-by="space" fo:text-indent="-18.00003118300pt" fo:margin-left="162.00028064700pt"/>
        </style:list-level-properties>
      </text:list-level-style-number>
      <text:list-level-style-number text:start-value="1" text:display-levels="1" style:num-suffix="." style:num-format="1" text:style-name="T18" text:level="9">
        <style:list-level-properties text:list-level-position-and-space-mode="label-alignment" fo:text-align="start">
          <style:list-level-label-alignment text:label-followed-by="space" fo:text-indent="-18.00003118300pt" fo:margin-left="180.00031183000pt"/>
        </style:list-level-properties>
      </text:list-level-style-number>
    </text:list-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page-layout style:name="pm1" style:page-usage="all">
      <style:page-layout-properties calligra:specialborder-bottom="none" calligra:specialborder-left="none" calligra:specialborder-right="none" calligra:specialborder-top="none" fo:border="0pt none #000000" fo:margin="56.693011599999998pt" fo:padding="0.000000000000000pt" fo:page-height="792.001372051999965pt" fo:page-width="612.001060221999978pt" style:print-orientation="portrait"/>
    </style:page-layout>
  </office:automatic-styles>
  <office:master-styles>
    <style:master-page style:name="MasterPage6" style:page-layout-name="pm1"/>
    <style:master-page style:name="Standard" style:display-name="Estándar"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5.12.3</meta:generator>
    <dc:title/>
    <meta:initial-creator>Desconocido</meta:initial-creator>
    <meta:editing-cycles>1</meta:editing-cycles>
    <dc:date>2026-03-27T04:19:09</dc:date>
    <meta:creation-date>2026-02-09T17:40:52Z</meta:creation-date>
    <dc:creator>paimon</dc:creator>
  </office:meta>
</office:document-meta>
</file>